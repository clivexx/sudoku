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Explanation:</text:h>
      <text:list text:style-name="L1">
        <text:list-item>
          <text:p text:style-name="P1"><text:span text:style-name="Source_20_Text">is_valid</text:span> checks if placing a number is valid at a given position.</text:p>
        </text:list-item>
        <text:list-item>
          <text:p text:style-name="P1"><text:span text:style-name="Source_20_Text">solve_sudoku</text:span> uses backtracking to attempt to fill in the grid.</text:p>
        </text:list-item>
        <text:list-item>
          <text:p text:style-name="P1"><text:span text:style-name="Source_20_Text">is_sudoku_solvable</text:span> returns <text:span text:style-name="Source_20_Text">True</text:span> if there's at least one valid solution.</text:p>
        </text:list-item>
      </text:list>
      <text:p text:style-name="Standard"/>
      <text:p text:style-name="Standard"/>
      <text:p text:style-name="Standard">def is_valid(board, row, col, num):</text:p>
      <text:p text:style-name="Standard"><text:s text:c="4"/># Check if num is not in the row</text:p>
      <text:p text:style-name="Standard"><text:s text:c="4"/>if num in board[row]:</text:p>
      <text:p text:style-name="Standard"><text:s text:c="8"/>return False</text:p>
      <text:p text:style-name="Standard"><text:s text:c="4"/></text:p>
      <text:p text:style-name="Standard"><text:s text:c="4"/># Check if num is not in the column</text:p>
      <text:p text:style-name="Standard"><text:s text:c="4"/>for i in range(9):</text:p>
      <text:p text:style-name="Standard"><text:s text:c="8"/>if board[i][col] == num:</text:p>
      <text:p text:style-name="Standard"><text:s text:c="12"/>return False</text:p>
      <text:p text:style-name="Standard"/>
      <text:p text:style-name="Standard"><text:s text:c="4"/># Check if num is not in the 3x3 box</text:p>
      <text:p text:style-name="Standard"><text:s text:c="4"/>start_row, start_col = 3 * (row // 3), 3 * (col // 3)</text:p>
      <text:p text:style-name="Standard"><text:s text:c="4"/>for i in range(3):</text:p>
      <text:p text:style-name="Standard"><text:s text:c="8"/>for j in range(3):</text:p>
      <text:p text:style-name="Standard"><text:s text:c="12"/>if board[start_row + i][start_col + j] == num:</text:p>
      <text:p text:style-name="Standard"><text:s text:c="16"/>return False</text:p>
      <text:p text:style-name="Standard"/>
      <text:p text:style-name="Standard"><text:s text:c="4"/>return True</text:p>
      <text:p text:style-name="Standard"/>
      <text:p text:style-name="Standard">def solve_sudoku(board):</text:p>
      <text:p text:style-name="Standard"><text:s text:c="4"/>for row in range(9):</text:p>
      <text:p text:style-name="Standard"><text:s text:c="8"/>for col in range(9):</text:p>
      <text:p text:style-name="Standard"><text:s text:c="12"/>if board[row][col] == 0:</text:p>
      <text:p text:style-name="Standard"><text:s text:c="16"/>for num in range(1, 10):</text:p>
      <text:p text:style-name="Standard"><text:s text:c="20"/>if is_valid(board, row, col, num):</text:p>
      <text:p text:style-name="Standard"><text:s text:c="24"/>board[row][col] = num</text:p>
      <text:p text:style-name="Standard"><text:s text:c="24"/>if solve_sudoku(board):</text:p>
      <text:p text:style-name="Standard"><text:s text:c="28"/>return True</text:p>
      <text:p text:style-name="Standard"><text:s text:c="24"/>board[row][col] = 0</text:p>
      <text:p text:style-name="Standard"><text:s text:c="16"/>return False</text:p>
      <text:p text:style-name="Standard"><text:s text:c="4"/>return True</text:p>
      <text:p text:style-name="Standard"/>
      <text:p text:style-name="Standard">def is_sudoku_solvable(board):</text:p>
      <text:p text:style-name="Standard"><text:s text:c="4"/>import copy</text:p>
      <text:p text:style-name="Standard"><text:s text:c="4"/>board_copy = copy.deepcopy(board)</text:p>
      <text:p text:style-name="Standard"><text:s text:c="4"/>return solve_sudoku(board_copy)</text:p>
      <text:p text:style-name="Standard"/>
      <text:p text:style-name="Standard"># Example usage</text:p>
      <text:p text:style-name="Standard">sudoku_puzzle = [</text:p>
      <text:p text:style-name="Standard"><text:s text:c="4"/>[5, 1, 7, 6, 0, 0, 0, 3, 4],</text:p>
      <text:p text:style-name="Standard"><text:s text:c="4"/>[2, 8, 9, 0, 0, 4, 0, 0, 0],</text:p>
      <text:p text:style-name="Standard"><text:s text:c="4"/>[3,](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6T09:50:07.007000000</meta:creation-date>
    <dc:date>2025-05-26T09:58:14.109000000</dc:date>
    <meta:editing-duration>PT8M8S</meta:editing-duration>
    <meta:editing-cycles>1</meta:editing-cycles>
    <meta:document-statistic meta:table-count="0" meta:image-count="0" meta:object-count="0" meta:page-count="1" meta:paragraph-count="41" meta:word-count="190" meta:character-count="1342" meta:non-whitespace-character-count="891"/>
    <meta:generator>LibreOffice/24.8.6.2$Windows_X86_64 LibreOffice_project/6d98ba145e9a8a39fc57bcc76981d1fb1316c60c</meta:generator>
  </office:meta>
</office:document-meta>
</file>