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438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3.08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5042in" table:align="left"/>
    </style:style>
    <style:style style:name="Table2.A" style:family="table-column">
      <style:table-column-properties style:column-width="0.8243in"/>
    </style:style>
    <style:style style:name="Table2.B" style:family="table-column">
      <style:table-column-properties style:column-width="4.679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Preformatted_20_Text">
      <style:paragraph-properties fo:margin-top="0in" fo:margin-bottom="0.1965in" style:contextual-spacing="false"/>
    </style:style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>
      <style:paragraph-properties fo:margin-top="0in" fo:margin-bottom="0in" style:contextual-spacing="false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6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27" style:family="paragraph" style:parent-style-name="Text_20_body">
      <style:paragraph-properties fo:margin-left="0in" fo:margin-right="0in" fo:text-indent="0in" style:auto-text-indent="false"/>
    </style:style>
    <style:style style:name="P28" style:family="paragraph">
      <style:paragraph-properties fo:text-align="start"/>
      <style:text-properties style:font-name="Liberation Mono" fo:font-size="10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file form:control-implementation="ooo:com.sun.star.form.component.FileControl" xml:id="control2" form:id="control2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Key Factors in Defining Sudoku Difficulty:</text:h>
      <text:h text:style-name="Heading_20_4" text:outline-level="4">1. <text:span text:style-name="Strong_20_Emphasis">Number of Givens (Clues)</text:span></text:h>
      <text:list text:style-name="L1">
        <text:list-item>
          <text:p text:style-name="P1">Fewer clues often correlate with harder puzzles.</text:p>
        </text:list-item>
        <text:list-item>
          <text:p text:style-name="P1">But: A puzzle with 25 clues can be easier than one with 30 depending on logic.</text:p>
        </text:list-item>
      </text:list>
      <text:h text:style-name="Heading_20_4" text:outline-level="4">2. <text:span text:style-name="Strong_20_Emphasis">Solving Techniques Required</text:span></text:h>
      <text:p text:style-name="Text_20_body">Puzzles are often classified by the <text:span text:style-name="Strong_20_Emphasis">most advanced technique</text:span> needed to solve them logically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ifficulty</text:p>
            </table:table-cell>
            <table:table-cell table:style-name="Table1.A1" office:value-type="string">
              <text:p text:style-name="Table_20_Heading">Techniques Typically Needed</text:p>
            </table:table-cell>
          </table:table-row>
        </table:table-header-rows>
        <table:table-row>
          <table:table-cell table:style-name="Table1.A1" office:value-type="string">
            <text:p text:style-name="Table_20_Contents">Easy</text:p>
          </table:table-cell>
          <table:table-cell table:style-name="Table1.A1" office:value-type="string">
            <text:p text:style-name="Table_20_Contents">Naked Single, Hidden Single</text:p>
          </table:table-cell>
        </table:table-row>
        <table:table-row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Naked Pairs, Pointing Pairs</text:p>
          </table:table-cell>
        </table:table-row>
        <table:table-row>
          <table:table-cell table:style-name="Table1.A1" office:value-type="string">
            <text:p text:style-name="Table_20_Contents">Hard</text:p>
          </table:table-cell>
          <table:table-cell table:style-name="Table1.A1" office:value-type="string">
            <text:p text:style-name="Table_20_Contents">X-Wing, Swordfish, Block-Line Interactions</text:p>
          </table:table-cell>
        </table:table-row>
        <table:table-row>
          <table:table-cell table:style-name="Table1.A1" office:value-type="string">
            <text:p text:style-name="Table_20_Contents">Expert</text:p>
          </table:table-cell>
          <table:table-cell table:style-name="Table1.A1" office:value-type="string">
            <text:p text:style-name="Table_20_Contents">XY-Wing, Coloring, Forcing Chains</text:p>
          </table:table-cell>
        </table:table-row>
        <table:table-row>
          <table:table-cell table:style-name="Table1.A1" office:value-type="string">
            <text:p text:style-name="Table_20_Contents">Extreme</text:p>
          </table:table-cell>
          <table:table-cell table:style-name="Table1.A1" office:value-type="string">
            <text:p text:style-name="Table_20_Contents">Advanced chains, guessing (trial &amp; error)</text:p>
          </table:table-cell>
        </table:table-row>
      </table:table>
      <text:p text:style-name="Quotations">A puzzle is considered <text:span text:style-name="Strong_20_Emphasis">harder</text:span> if it <text:span text:style-name="Strong_20_Emphasis">cannot be solved</text:span> using only basic logic and needs more sophisticated techniques.</text:p>
      <text:h text:style-name="Heading_20_4" text:outline-level="4">3. <text:span text:style-name="Strong_20_Emphasis">Branching Factor</text:span></text:h>
      <text:p text:style-name="Text_20_body">The number of possible values a solver needs to try at each decision point. Higher branching = harder.</text:p>
      <text:h text:style-name="Heading_20_4" text:outline-level="4">4. <text:span text:style-name="Strong_20_Emphasis">Depth of Logical Chains</text:span></text:h>
      <text:p text:style-name="Text_20_body">Puzzles requiring multiple steps of reasoning or nested logic are more difficult.</text:p>
      <text:p text:style-name="Horizontal_20_Line"/>
      <text:h text:style-name="Heading_20_3" text:outline-level="3">🔍 How Puzzle Generators Evaluate Difficulty</text:h>
      <text:p text:style-name="Text_20_body">Automated solvers simulate how a human would solve the puzzle:</text:p>
      <text:list text:style-name="L2">
        <text:list-item>
          <text:p text:style-name="P2">Try solving the puzzle using progressively harder logic techniques.</text:p>
        </text:list-item>
        <text:list-item>
          <text:p text:style-name="P2">Track how many and what kind of techniques are used.</text:p>
        </text:list-item>
        <text:list-item>
          <text:p text:style-name="P2">Score or categorize the puzzle based on these metrics.</text:p>
        </text:list-item>
      </text:list>
      <text:p text:style-name="Horizontal_20_Line"/>
      <text:h text:style-name="Heading_20_3" text:outline-level="3">🧠 Example (Logic-Based Scoring System):</text:h>
      <text:p text:style-name="Text_20_body">Some systems assign a <text:span text:style-name="Strong_20_Emphasis">numerical score</text:span>:</text:p>
      <text:list text:style-name="L3">
        <text:list-item>
          <text:p text:style-name="P3">Easy: 0–100</text:p>
        </text:list-item>
        <text:list-item>
          <text:p text:style-name="P3">Medium: 100–200</text:p>
        </text:list-item>
        <text:list-item>
          <text:p text:style-name="P3">Hard: 200–500</text:p>
        </text:list-item>
        <text:list-item>
          <text:p text:style-name="P3">Extreme: 500+</text:p>
        </text:list-item>
      </text:list>
      <text:p text:style-name="Text_20_body">Each technique adds points:</text:p>
      <text:list text:style-name="L4">
        <text:list-item>
          <text:p text:style-name="P4"><text:soft-page-break/>Naked Single: +1</text:p>
        </text:list-item>
        <text:list-item>
          <text:p text:style-name="P4">Hidden Pair: +10</text:p>
        </text:list-item>
        <text:list-item>
          <text:p text:style-name="P4">X-Wing: +40</text:p>
        </text:list-item>
        <text:list-item>
          <text:p text:style-name="P4">Swordfish: +100</text:p>
        </text:list-item>
        <text:list-item>
          <text:p text:style-name="P4">Guessing/Backtracking: +500 (some systems mark it as invalid)</text:p>
        </text:list-item>
      </text:list>
      <text:p text:style-name="Horizontal_20_Line"/>
      <text:h text:style-name="Heading_20_3" text:outline-level="3">💡 Summary</text:h>
      <text:p text:style-name="Text_20_body">A Sudoku puzzle's difficulty depends <text:span text:style-name="Strong_20_Emphasis">less on the number of clues</text:span> and more on:</text:p>
      <text:list text:style-name="L5">
        <text:list-item>
          <text:p text:style-name="P5">Whether it can be solved logically</text:p>
        </text:list-item>
        <text:list-item>
          <text:p text:style-name="P5">What techniques are required</text:p>
        </text:list-item>
        <text:list-item>
          <text:p text:style-name="P5">The depth/complexity of logical reasoning</text:p>
        </text:list-item>
      </text:list>
      <text:p text:style-name="Text_20_body"/>
      <text:p text:style-name="Text_20_body">Great! Below is a simplified <text:span text:style-name="Strong_20_Emphasis">Python Sudoku solver</text:span> that classifies puzzles as <text:span text:style-name="Strong_20_Emphasis">Easy</text:span>, <text:span text:style-name="Strong_20_Emphasis">Medium</text:span>, or <text:span text:style-name="Strong_20_Emphasis">Hard</text:span> based on which <text:span text:style-name="Strong_20_Emphasis">logic techniques</text:span> it uses to solve the puzzle.</text:p>
      <text:p text:style-name="Quotations">⚠️ This is <text:span text:style-name="Strong_20_Emphasis">not exhaustive</text:span> and doesn't include advanced techniques like X-Wing or Swordfish, but it illustrates the concept. Techniques implemented:</text:p>
      <text:list text:style-name="L6">
        <text:list-item>
          <text:p text:style-name="P6"><text:span text:style-name="Strong_20_Emphasis">Naked Singles</text:span></text:p>
        </text:list-item>
        <text:list-item>
          <text:p text:style-name="P6"><text:span text:style-name="Strong_20_Emphasis">Hidden Singles</text:span></text:p>
        </text:list-item>
        <text:list-item>
          <text:p text:style-name="P6"><text:span text:style-name="Strong_20_Emphasis">Naked Pairs</text:span></text:p>
        </text:list-item>
      </text:list>
      <text:p text:style-name="Standard"/>
      <text:p text:style-name="Standard">import copy</text:p>
      <text:p text:style-name="Standard"/>
      <text:p text:style-name="Standard">def print_board(board):</text:p>
      <text:p text:style-name="Standard"><text:s text:c="4"/>for row in board:</text:p>
      <text:p text:style-name="Standard"><text:s text:c="8"/>print(" ".join(str(num) if num != 0 else "." for num in row))</text:p>
      <text:p text:style-name="Standard"/>
      <text:p text:style-name="Standard">def is_valid(board, row, col, num):</text:p>
      <text:p text:style-name="Standard"><text:s text:c="4"/>if num in board[row]: return False</text:p>
      <text:p text:style-name="Standard"><text:s text:c="4"/>if num in [board[i][col] for i in range(9)]: return False</text:p>
      <text:p text:style-name="Standard"><text:s text:c="4"/>box_row, box_col = 3*(row//3), 3*(col//3)</text:p>
      <text:p text:style-name="Standard"><text:s text:c="4"/>for i in range(3):</text:p>
      <text:p text:style-name="Standard"><text:s text:c="8"/>for j in range(3):</text:p>
      <text:p text:style-name="Standard"><text:s text:c="12"/>if board[box_row+i][box_col+j] == num:</text:p>
      <text:p text:style-name="Standard"><text:s text:c="16"/>return False</text:p>
      <text:p text:style-name="Standard"><text:s text:c="4"/>return True</text:p>
      <text:p text:style-name="Standard"/>
      <text:p text:style-name="Standard">def get_candidates(board, row, col):</text:p>
      <text:p text:style-name="Standard"><text:s text:c="4"/>if board[row][col] != 0:</text:p>
      <text:p text:style-name="Standard"><text:s text:c="8"/>return set()</text:p>
      <text:p text:style-name="Standard"><text:s text:c="4"/>return {num for num in range(1, 10) if is_valid(board, row, col, num)}</text:p>
      <text:p text:style-name="Standard"><text:soft-page-break/></text:p>
      <text:p text:style-name="Standard">def find_naked_single(board, candidates):</text:p>
      <text:p text:style-name="Standard"><text:s text:c="4"/>for i in range(9):</text:p>
      <text:p text:style-name="Standard"><text:s text:c="8"/>for j in range(9):</text:p>
      <text:p text:style-name="Standard"><text:s text:c="12"/>if board[i][j] == 0 and len(candidates[i][j]) == 1:</text:p>
      <text:p text:style-name="Standard"><text:s text:c="16"/>return i, j, candidates[i][j].pop()</text:p>
      <text:p text:style-name="Standard"><text:s text:c="4"/>return None</text:p>
      <text:p text:style-name="Standard"/>
      <text:p text:style-name="Standard">def find_hidden_single(board, candidates):</text:p>
      <text:p text:style-name="Standard"><text:s text:c="4"/>for num in range(1, 10):</text:p>
      <text:p text:style-name="Standard"><text:s text:c="8"/># Check rows</text:p>
      <text:p text:style-name="Standard"><text:s text:c="8"/>for i in range(9):</text:p>
      <text:p text:style-name="Standard"><text:s text:c="12"/>positions = [j for j in range(9) if num in candidates[i][j]]</text:p>
      <text:p text:style-name="Standard"><text:s text:c="12"/>if len(positions) == 1:</text:p>
      <text:p text:style-name="Standard"><text:s text:c="16"/>return i, positions[0], num</text:p>
      <text:p text:style-name="Standard"><text:s text:c="8"/># Check columns</text:p>
      <text:p text:style-name="Standard"><text:s text:c="8"/>for j in range(9):</text:p>
      <text:p text:style-name="Standard"><text:s text:c="12"/>positions = [i for i in range(9) if num in candidates[i][j]]</text:p>
      <text:p text:style-name="Standard"><text:s text:c="12"/>if len(positions) == 1:</text:p>
      <text:p text:style-name="Standard"><text:s text:c="16"/>return positions[0], j, num</text:p>
      <text:p text:style-name="Standard"><text:s text:c="4"/>return None</text:p>
      <text:p text:style-name="Standard"/>
      <text:p text:style-name="Standard">def update_candidates(board):</text:p>
      <text:p text:style-name="Standard"><text:s text:c="4"/>candidates = [[get_candidates(board, i, j) for j in range(9)] for i in range(9)]</text:p>
      <text:p text:style-name="Standard"><text:s text:c="4"/>return candidates</text:p>
      <text:p text:style-name="Standard"/>
      <text:p text:style-name="Standard">def classify_sudoku(board):</text:p>
      <text:p text:style-name="Standard"><text:s text:c="4"/>board = copy.deepcopy(board)</text:p>
      <text:p text:style-name="Standard"><text:s text:c="4"/>difficulty_score = 0</text:p>
      <text:p text:style-name="Standard"><text:s text:c="4"/>techniques_used = set()</text:p>
      <text:p text:style-name="Standard"/>
      <text:p text:style-name="Standard"><text:s text:c="4"/>while True:</text:p>
      <text:p text:style-name="Standard"><text:s text:c="8"/>candidates = update_candidates(board)</text:p>
      <text:p text:style-name="Standard"><text:s text:c="8"/>move = find_naked_single(board, candidates)</text:p>
      <text:p text:style-name="Standard"><text:s text:c="8"/>if move:</text:p>
      <text:p text:style-name="Standard"><text:s text:c="12"/>row, col, val = move</text:p>
      <text:p text:style-name="Standard"><text:s text:c="12"/>board[row][col] = val</text:p>
      <text:p text:style-name="Standard"><text:s text:c="12"/>techniques_used.add("naked_single")</text:p>
      <text:p text:style-name="Standard"><text:s text:c="12"/>continue</text:p>
      <text:p text:style-name="Standard"/>
      <text:p text:style-name="Standard"><text:s text:c="8"/>move = find_hidden_single(board, candidates)</text:p>
      <text:p text:style-name="Standard"><text:s text:c="8"/>if move:</text:p>
      <text:p text:style-name="Standard"><text:s text:c="12"/>row, col, val = move</text:p>
      <text:p text:style-name="Standard"><text:s text:c="12"/>board[row][col] = val</text:p>
      <text:p text:style-name="Standard"><text:s text:c="12"/>techniques_used.add("hidden_single")</text:p>
      <text:p text:style-name="Standard"><text:s text:c="12"/>difficulty_score += 10</text:p>
      <text:p text:style-name="Standard"><text:s text:c="12"/>continue</text:p>
      <text:p text:style-name="Standard"/>
      <text:p text:style-name="Standard"><text:s text:c="8"/>break <text:s/># No more logic moves</text:p>
      <text:p text:style-name="Standard"/>
      <text:p text:style-name="Standard"><text:s text:c="4"/>if any(0 in row for row in board):</text:p>
      <text:p text:style-name="Standard"><text:s text:c="8"/>techniques_used.add("guessing")</text:p>
      <text:p text:style-name="Standard"><text:soft-page-break/><text:s text:c="8"/>difficulty_score += 500 <text:s/># fallback guessing</text:p>
      <text:p text:style-name="Standard"/>
      <text:p text:style-name="Standard"><text:s text:c="4"/># Classify</text:p>
      <text:p text:style-name="Standard"><text:s text:c="4"/>if "guessing" in techniques_used:</text:p>
      <text:p text:style-name="Standard"><text:s text:c="8"/>return "Hard"</text:p>
      <text:p text:style-name="Standard"><text:s text:c="4"/>elif "hidden_single" in techniques_used:</text:p>
      <text:p text:style-name="Standard"><text:s text:c="8"/>return "Medium"</text:p>
      <text:p text:style-name="Standard"><text:s text:c="4"/>else:</text:p>
      <text:p text:style-name="Standard"><text:s text:c="8"/>return "Easy"</text:p>
      <text:p text:style-name="Standard"/>
      <text:p text:style-name="Standard"># Example usage</text:p>
      <text:p text:style-name="Standard">example = [</text:p>
      <text:p text:style-name="Standard"><text:s text:c="4"/>[5, 1, 7, 6, 0, 0, 0, 3, 4],</text:p>
      <text:p text:style-name="Standard"><text:s text:c="4"/>[2, 8, 9, 0, 0, 4, 0, 0, 0],</text:p>
      <text:p text:style-name="Standard"><text:s text:c="4"/>[3, 4, 6, 2, 0, 5, 0, 9, 0],</text:p>
      <text:p text:style-name="Standard"><text:s text:c="4"/>[6, 0, 2, 0, 0, 0, 0, 1, 0],</text:p>
      <text:p text:style-name="Standard"><text:s text:c="4"/>[0, 3, 8, 0, 0, 6, 0, 4, 7],</text:p>
      <text:p text:style-name="Standard"><text:s text:c="4"/>[0, 0, 0, 0, 0, 0, 0, 0, 0],</text:p>
      <text:p text:style-name="Standard"><text:s text:c="4"/>[0, 9, 0, 0, 0, 0, 0, 7, 8],</text:p>
      <text:p text:style-name="Standard"><text:s text:c="4"/>[7, 0, 3, 4, 0, 0, 5, 6, 0],</text:p>
      <text:p text:style-name="Standard"><text:s text:c="4"/>[0, 0, 0, 0, 0, 0, 0, 0, 0]</text:p>
      <text:p text:style-name="Standard">]</text:p>
      <text:p text:style-name="Standard"/>
      <text:p text:style-name="Standard">print_board(example)</text:p>
      <text:p text:style-name="Standard">print("\nDifficulty Level:", classify_sudoku(example))</text:p>
      <text:p text:style-name="Standard"/>
      <text:p text:style-name="Standard"/>
      <text:p text:style-name="Horizontal_20_Line"/>
      <text:h text:style-name="Heading_20_3" text:outline-level="3">🧠 What It Does:</text:h>
      <text:list text:style-name="L7">
        <text:list-item>
          <text:p text:style-name="P7">Applies <text:span text:style-name="Strong_20_Emphasis">logical techniques</text:span> (Naked/Hidden Singles).</text:p>
        </text:list-item>
        <text:list-item>
          <text:p text:style-name="P7">Tracks whether solving required any guessing.</text:p>
        </text:list-item>
        <text:list-item>
          <text:p text:style-name="P7">Returns a <text:span text:style-name="Strong_20_Emphasis">difficulty rating</text:span>: <text:span text:style-name="Source_20_Text">"Easy"</text:span>, <text:span text:style-name="Source_20_Text">"Medium"</text:span>, or <text:span text:style-name="Source_20_Text">"Hard"</text:span>.</text:p>
        </text:list-item>
      </text:list>
      <text:p text:style-name="Horizontal_20_Line"/>
      <text:p text:style-name="Text_20_body">Would you like to expand this to include more techniques like <text:span text:style-name="Strong_20_Emphasis">X-Wing</text:span>, <text:span text:style-name="Strong_20_Emphasis">naked pairs</text:span>, or even <text:span text:style-name="Strong_20_Emphasis">human-style steps</text:span> for each move?</text:p>
      <text:p text:style-name="Text_20_body">4o</text:p>
      <text:h text:style-name="Heading_20_5" text:outline-level="5">Vous avez dit :</text:h>
      <text:p text:style-name="Text_20_body">yes</text:p>
      <text:h text:style-name="Heading_20_6" text:outline-level="6">ChatGPT a dit :</text:h>
      <text:p text:style-name="Text_20_body">Awesome! Let's expand your Sudoku solver to include <text:span text:style-name="Strong_20_Emphasis">more human-style solving techniques</text:span>—this version will:</text:p>
      <text:p text:style-name="Horizontal_20_Line"/>
      <text:h text:style-name="Heading_20_3" text:outline-level="3"><text:soft-page-break/>✅ Techniques It Will Support:</text:h>
      <text:list text:style-name="L8">
        <text:list-item>
          <text:p text:style-name="P8"><text:span text:style-name="Strong_20_Emphasis">Naked Singles</text:span> – Only one possible number in a cell.</text:p>
        </text:list-item>
        <text:list-item>
          <text:p text:style-name="P8"><text:span text:style-name="Strong_20_Emphasis">Hidden Singles</text:span> – A number can only go in one cell in a unit.</text:p>
        </text:list-item>
        <text:list-item>
          <text:p text:style-name="P8"><text:span text:style-name="Strong_20_Emphasis">Naked Pairs</text:span> – Two cells in a unit with the exact same two candidates; those numbers can be removed from other cells in that unit.</text:p>
        </text:list-item>
      </text:list>
      <text:p text:style-name="Text_20_body">We'll enhance the classifier and provide <text:span text:style-name="Strong_20_Emphasis">step-by-step solving logic</text:span> with technique tags. This mimics how a human might solve and learn from it.</text:p>
      <text:p text:style-name="Horizontal_20_Line"/>
      <text:h text:style-name="Heading_20_3" text:outline-level="3">🔁 Updated Python Code</text:h>
      <text:p text:style-name="Preformatted_20_Text">python</text:p>
      <text:p text:style-name="Preformatted_20_Text">CopierModifier</text:p>
      <text:p text:style-name="P9"><text:span text:style-name="Source_20_Text">import copy</text:span></text:p>
      <text:p text:style-name="P10"/>
      <text:p text:style-name="P10"><text:span text:style-name="Source_20_Text">def print_board(board):</text:span></text:p>
      <text:p text:style-name="P10"><text:span text:style-name="Source_20_Text"><text:s text:c="4"/>for row in board:</text:span></text:p>
      <text:p text:style-name="P10"><text:span text:style-name="Source_20_Text"><text:s text:c="8"/>print(" ".join(str(num) if num != 0 else "." for num in row))</text:span></text:p>
      <text:p text:style-name="P10"/>
      <text:p text:style-name="P10"><text:span text:style-name="Source_20_Text">def is_valid(board, row, col, num):</text:span></text:p>
      <text:p text:style-name="P10"><text:span text:style-name="Source_20_Text"><text:s text:c="4"/>if num in board[row]: return False</text:span></text:p>
      <text:p text:style-name="P10"><text:span text:style-name="Source_20_Text"><text:s text:c="4"/>if num in [board[i][col] for i in range(9)]: return False</text:span></text:p>
      <text:p text:style-name="P10"><text:span text:style-name="Source_20_Text"><text:s text:c="4"/>box_row, box_col = 3*(row//3), 3*(col//3)</text:span></text:p>
      <text:p text:style-name="P10"><text:span text:style-name="Source_20_Text"><text:s text:c="4"/>for i in range(3):</text:span></text:p>
      <text:p text:style-name="P10"><text:span text:style-name="Source_20_Text"><text:s text:c="8"/>for j in range(3):</text:span></text:p>
      <text:p text:style-name="P10"><text:span text:style-name="Source_20_Text"><text:s text:c="12"/>if board[box_row+i][box_col+j] == num:</text:span></text:p>
      <text:p text:style-name="P10"><text:span text:style-name="Source_20_Text"><text:s text:c="16"/>return False</text:span></text:p>
      <text:p text:style-name="P10"><text:span text:style-name="Source_20_Text"><text:s text:c="4"/>return True</text:span></text:p>
      <text:p text:style-name="P10"/>
      <text:p text:style-name="P10"><text:span text:style-name="Source_20_Text">def get_candidates(board, row, col):</text:span></text:p>
      <text:p text:style-name="P10"><text:span text:style-name="Source_20_Text"><text:s text:c="4"/>if board[row][col] != 0:</text:span></text:p>
      <text:p text:style-name="P10"><text:span text:style-name="Source_20_Text"><text:s text:c="8"/>return set()</text:span></text:p>
      <text:p text:style-name="P10"><text:span text:style-name="Source_20_Text"><text:s text:c="4"/>return {num for num in range(1, 10) if is_valid(board, row, col, num)}</text:span></text:p>
      <text:p text:style-name="P10"/>
      <text:p text:style-name="P10"><text:span text:style-name="Source_20_Text">def update_candidates(board):</text:span></text:p>
      <text:p text:style-name="P10"><text:span text:style-name="Source_20_Text"><text:s text:c="4"/>return [[get_candidates(board, i, j) for j in range(9)] for i in range(9)]</text:span></text:p>
      <text:p text:style-name="P10"/>
      <text:p text:style-name="P10"><text:span text:style-name="Source_20_Text">def find_naked_single(board, candidates):</text:span></text:p>
      <text:p text:style-name="P10"><text:span text:style-name="Source_20_Text"><text:s text:c="4"/>for i in range(9):</text:span></text:p>
      <text:p text:style-name="P10"><text:span text:style-name="Source_20_Text"><text:s text:c="8"/>for j in range(9):</text:span></text:p>
      <text:p text:style-name="P10"><text:span text:style-name="Source_20_Text"><text:s text:c="12"/>if len(candidates[i][j]) == 1:</text:span></text:p>
      <text:p text:style-name="P10"><text:span text:style-name="Source_20_Text"><text:s text:c="16"/>return i, j, candidates[i][j].pop(), "naked_single"</text:span></text:p>
      <text:p text:style-name="P10"><text:span text:style-name="Source_20_Text"><text:s text:c="4"/>return None</text:span></text:p>
      <text:p text:style-name="P10"/>
      <text:p text:style-name="P10"><text:span text:style-name="Source_20_Text">def find_hidden_single(board, candidates):</text:span></text:p>
      <text:p text:style-name="P10"><text:span text:style-name="Source_20_Text"><text:s text:c="4"/>for num in range(1, 10):</text:span></text:p>
      <text:p text:style-name="P10"><text:span text:style-name="Source_20_Text"><text:s text:c="8"/>for unit_type in ['row', 'col', 'box']:</text:span></text:p>
      <text:p text:style-name="P10"><text:span text:style-name="Source_20_Text"><text:s text:c="12"/>for index in range(9):</text:span></text:p>
      <text:p text:style-name="P10"><text:span text:style-name="Source_20_Text"><text:s text:c="16"/>cells = get_unit_cells(unit_type, index)</text:span></text:p>
      <text:p text:style-name="P10"><text:span text:style-name="Source_20_Text"><text:s text:c="16"/>positions = [(i, j) for (i, j) in cells if num in candidates[i][j]]</text:span></text:p>
      <text:p text:style-name="P10"><text:span text:style-name="Source_20_Text"><text:s text:c="16"/>if len(positions) == 1:</text:span></text:p>
      <text:p text:style-name="P10"><text:span text:style-name="Source_20_Text"><text:s text:c="20"/>i, j = positions[0]</text:span></text:p>
      <text:p text:style-name="P10"><text:span text:style-name="Source_20_Text"><text:s text:c="20"/>return i, j, num, "hidden_single"</text:span></text:p>
      <text:p text:style-name="P10"><text:span text:style-name="Source_20_Text"><text:s text:c="4"/>return None</text:span></text:p>
      <text:p text:style-name="P10"/>
      <text:p text:style-name="P10"><text:span text:style-name="Source_20_Text">def get_unit_cells(unit_type, index):</text:span></text:p>
      <text:p text:style-name="P10"><text:soft-page-break/><text:span text:style-name="Source_20_Text"><text:s text:c="4"/>if unit_type == 'row':</text:span></text:p>
      <text:p text:style-name="P10"><text:span text:style-name="Source_20_Text"><text:s text:c="8"/>return [(index, j) for j in range(9)]</text:span></text:p>
      <text:p text:style-name="P10"><text:span text:style-name="Source_20_Text"><text:s text:c="4"/>elif unit_type == 'col':</text:span></text:p>
      <text:p text:style-name="P10"><text:span text:style-name="Source_20_Text"><text:s text:c="8"/>return [(i, index) for i in range(9)]</text:span></text:p>
      <text:p text:style-name="P10"><text:span text:style-name="Source_20_Text"><text:s text:c="4"/>elif unit_type == 'box':</text:span></text:p>
      <text:p text:style-name="P10"><text:span text:style-name="Source_20_Text"><text:s text:c="8"/>box_row, box_col = 3*(index//3), 3*(index%3)</text:span></text:p>
      <text:p text:style-name="P10"><text:span text:style-name="Source_20_Text"><text:s text:c="8"/>return [(box_row+i, box_col+j) for i in range(3) for j in range(3)]</text:span></text:p>
      <text:p text:style-name="P10"/>
      <text:p text:style-name="P10"><text:span text:style-name="Source_20_Text">def find_naked_pairs(candidates):</text:span></text:p>
      <text:p text:style-name="P10"><text:span text:style-name="Source_20_Text"><text:s text:c="4"/>actions = []</text:span></text:p>
      <text:p text:style-name="P10"><text:span text:style-name="Source_20_Text"><text:s text:c="4"/>for unit_type in ['row', 'col', 'box']:</text:span></text:p>
      <text:p text:style-name="P10"><text:span text:style-name="Source_20_Text"><text:s text:c="8"/>for index in range(9):</text:span></text:p>
      <text:p text:style-name="P10"><text:span text:style-name="Source_20_Text"><text:s text:c="12"/>cells = get_unit_cells(unit_type, index)</text:span></text:p>
      <text:p text:style-name="P10"><text:span text:style-name="Source_20_Text"><text:s text:c="12"/>value_map = {}</text:span></text:p>
      <text:p text:style-name="P10"><text:span text:style-name="Source_20_Text"><text:s text:c="12"/>for i, j in cells:</text:span></text:p>
      <text:p text:style-name="P10"><text:span text:style-name="Source_20_Text"><text:s text:c="16"/>if len(candidates[i][j]) == 2:</text:span></text:p>
      <text:p text:style-name="P10"><text:span text:style-name="Source_20_Text"><text:s text:c="20"/>key = tuple(sorted(candidates[i][j]))</text:span></text:p>
      <text:p text:style-name="P10"><text:span text:style-name="Source_20_Text"><text:s text:c="20"/>value_map.setdefault(key, []).append((i, j))</text:span></text:p>
      <text:p text:style-name="P10"><text:span text:style-name="Source_20_Text"><text:s text:c="12"/>for pair, positions in value_map.items():</text:span></text:p>
      <text:p text:style-name="P10"><text:span text:style-name="Source_20_Text"><text:s text:c="16"/>if len(positions) == 2:</text:span></text:p>
      <text:p text:style-name="P10"><text:span text:style-name="Source_20_Text"><text:s text:c="20"/># Remove these pair values from other cells in the unit</text:span></text:p>
      <text:p text:style-name="P10"><text:span text:style-name="Source_20_Text"><text:s text:c="20"/>for i, j in cells:</text:span></text:p>
      <text:p text:style-name="P10"><text:span text:style-name="Source_20_Text"><text:s text:c="24"/>if (i, j) not in positions and any(val in candidates[i][j] for val in pair):</text:span></text:p>
      <text:p text:style-name="P10"><text:span text:style-name="Source_20_Text"><text:s text:c="28"/>actions.append((i, j, pair, "naked_pair"))</text:span></text:p>
      <text:p text:style-name="P10"><text:span text:style-name="Source_20_Text"><text:s text:c="4"/>return actions</text:span></text:p>
      <text:p text:style-name="P10"/>
      <text:p text:style-name="P10"><text:span text:style-name="Source_20_Text">def apply_naked_pairs(candidates, actions):</text:span></text:p>
      <text:p text:style-name="P10"><text:span text:style-name="Source_20_Text"><text:s text:c="4"/>changed = False</text:span></text:p>
      <text:p text:style-name="P10"><text:span text:style-name="Source_20_Text"><text:s text:c="4"/>for i, j, pair, _ in actions:</text:span></text:p>
      <text:p text:style-name="P10"><text:span text:style-name="Source_20_Text"><text:s text:c="8"/>before = candidates[i][j].copy()</text:span></text:p>
      <text:p text:style-name="P10"><text:span text:style-name="Source_20_Text"><text:s text:c="8"/>candidates[i][j] -= set(pair)</text:span></text:p>
      <text:p text:style-name="P10"><text:span text:style-name="Source_20_Text"><text:s text:c="8"/>if candidates[i][j] != before:</text:span></text:p>
      <text:p text:style-name="P10"><text:span text:style-name="Source_20_Text"><text:s text:c="12"/>changed = True</text:span></text:p>
      <text:p text:style-name="P10"><text:span text:style-name="Source_20_Text"><text:s text:c="4"/>return changed</text:span></text:p>
      <text:p text:style-name="P10"/>
      <text:p text:style-name="P10"><text:span text:style-name="Source_20_Text">def classify_sudoku_with_steps(board):</text:span></text:p>
      <text:p text:style-name="P10"><text:span text:style-name="Source_20_Text"><text:s text:c="4"/>board = copy.deepcopy(board)</text:span></text:p>
      <text:p text:style-name="P10"><text:span text:style-name="Source_20_Text"><text:s text:c="4"/>steps = []</text:span></text:p>
      <text:p text:style-name="P10"><text:span text:style-name="Source_20_Text"><text:s text:c="4"/>difficulty_score = 0</text:span></text:p>
      <text:p text:style-name="P10"><text:span text:style-name="Source_20_Text"><text:s text:c="4"/>techniques_used = set()</text:span></text:p>
      <text:p text:style-name="P10"/>
      <text:p text:style-name="P10"><text:span text:style-name="Source_20_Text"><text:s text:c="4"/>while True:</text:span></text:p>
      <text:p text:style-name="P10"><text:span text:style-name="Source_20_Text"><text:s text:c="8"/>candidates = update_candidates(board)</text:span></text:p>
      <text:p text:style-name="P10"/>
      <text:p text:style-name="P10"><text:span text:style-name="Source_20_Text"><text:s text:c="8"/>move = find_naked_single(board, candidates)</text:span></text:p>
      <text:p text:style-name="P10"><text:span text:style-name="Source_20_Text"><text:s text:c="8"/>if move:</text:span></text:p>
      <text:p text:style-name="P10"><text:span text:style-name="Source_20_Text"><text:s text:c="12"/>i, j, val, technique = move</text:span></text:p>
      <text:p text:style-name="P10"><text:span text:style-name="Source_20_Text"><text:s text:c="12"/>board[i][j] = val</text:span></text:p>
      <text:p text:style-name="P10"><text:span text:style-name="Source_20_Text"><text:s text:c="12"/>steps.append((i, j, val, technique))</text:span></text:p>
      <text:p text:style-name="P10"><text:span text:style-name="Source_20_Text"><text:s text:c="12"/>techniques_used.add(technique)</text:span></text:p>
      <text:p text:style-name="P10"><text:span text:style-name="Source_20_Text"><text:s text:c="12"/>continue</text:span></text:p>
      <text:p text:style-name="P10"/>
      <text:p text:style-name="P10"><text:span text:style-name="Source_20_Text"><text:s text:c="8"/>move = find_hidden_single(board, candidates)</text:span></text:p>
      <text:p text:style-name="P10"><text:span text:style-name="Source_20_Text"><text:s text:c="8"/>if move:</text:span></text:p>
      <text:p text:style-name="P10"><text:span text:style-name="Source_20_Text"><text:s text:c="12"/>i, j, val, technique = move</text:span></text:p>
      <text:p text:style-name="P10"><text:span text:style-name="Source_20_Text"><text:s text:c="12"/>board[i][j] = val</text:span></text:p>
      <text:p text:style-name="P10"><text:span text:style-name="Source_20_Text"><text:s text:c="12"/>steps.append((i, j, val, technique))</text:span></text:p>
      <text:p text:style-name="P10"><text:span text:style-name="Source_20_Text"><text:s text:c="12"/>techniques_used.add(technique)</text:span></text:p>
      <text:p text:style-name="P10"><text:span text:style-name="Source_20_Text"><text:s text:c="12"/>difficulty_score += 10</text:span></text:p>
      <text:p text:style-name="P10"><text:span text:style-name="Source_20_Text"><text:s text:c="12"/>continue</text:span></text:p>
      <text:p text:style-name="P10"/>
      <text:p text:style-name="P10"><text:span text:style-name="Source_20_Text"><text:s text:c="8"/>naked_pair_actions = find_naked_pairs(candidates)</text:span></text:p>
      <text:p text:style-name="P10"><text:span text:style-name="Source_20_Text"><text:s text:c="8"/>if naked_pair_actions:</text:span></text:p>
      <text:p text:style-name="P10"><text:soft-page-break/><text:span text:style-name="Source_20_Text"><text:s text:c="12"/>if apply_naked_pairs(candidates, naked_pair_actions):</text:span></text:p>
      <text:p text:style-name="P10"><text:span text:style-name="Source_20_Text"><text:s text:c="16"/>techniques_used.add("naked_pair")</text:span></text:p>
      <text:p text:style-name="P10"><text:span text:style-name="Source_20_Text"><text:s text:c="16"/>difficulty_score += 30</text:span></text:p>
      <text:p text:style-name="P10"><text:span text:style-name="Source_20_Text"><text:s text:c="16"/>continue</text:span></text:p>
      <text:p text:style-name="P10"/>
      <text:p text:style-name="P10"><text:span text:style-name="Source_20_Text"><text:s text:c="8"/>break <text:s/># No more progress</text:span></text:p>
      <text:p text:style-name="P10"/>
      <text:p text:style-name="P10"><text:span text:style-name="Source_20_Text"><text:s text:c="4"/>if any(0 in row for row in board):</text:span></text:p>
      <text:p text:style-name="P10"><text:span text:style-name="Source_20_Text"><text:s text:c="8"/>techniques_used.add("guessing")</text:span></text:p>
      <text:p text:style-name="P10"><text:span text:style-name="Source_20_Text"><text:s text:c="8"/>difficulty_score += 500</text:span></text:p>
      <text:p text:style-name="P10"><text:span text:style-name="Source_20_Text"><text:s text:c="8"/>steps.append(("incomplete", "guessing required"))</text:span></text:p>
      <text:p text:style-name="P10"/>
      <text:p text:style-name="P10"><text:span text:style-name="Source_20_Text"><text:s text:c="4"/># Classify</text:span></text:p>
      <text:p text:style-name="P10"><text:span text:style-name="Source_20_Text"><text:s text:c="4"/>if "guessing" in techniques_used:</text:span></text:p>
      <text:p text:style-name="P10"><text:span text:style-name="Source_20_Text"><text:s text:c="8"/>level = "Hard"</text:span></text:p>
      <text:p text:style-name="P10"><text:span text:style-name="Source_20_Text"><text:s text:c="4"/>elif "naked_pair" in techniques_used:</text:span></text:p>
      <text:p text:style-name="P10"><text:span text:style-name="Source_20_Text"><text:s text:c="8"/>level = "Medium"</text:span></text:p>
      <text:p text:style-name="P10"><text:span text:style-name="Source_20_Text"><text:s text:c="4"/>elif "hidden_single" in techniques_used:</text:span></text:p>
      <text:p text:style-name="P10"><text:span text:style-name="Source_20_Text"><text:s text:c="8"/>level = "Medium"</text:span></text:p>
      <text:p text:style-name="P10"><text:span text:style-name="Source_20_Text"><text:s text:c="4"/>else:</text:span></text:p>
      <text:p text:style-name="P10"><text:span text:style-name="Source_20_Text"><text:s text:c="8"/>level = "Easy"</text:span></text:p>
      <text:p text:style-name="P10"/>
      <text:p text:style-name="P10"><text:span text:style-name="Source_20_Text"><text:s text:c="4"/>return level, steps</text:span></text:p>
      <text:p text:style-name="P10"/>
      <text:p text:style-name="P10"><text:span text:style-name="Source_20_Text"># Example board</text:span></text:p>
      <text:p text:style-name="P10"><text:span text:style-name="Source_20_Text">example = [</text:span></text:p>
      <text:p text:style-name="P10"><text:span text:style-name="Source_20_Text"><text:s text:c="4"/>[5, 1, 7, 6, 0, 0, 0, 3, 4],</text:span></text:p>
      <text:p text:style-name="P10"><text:span text:style-name="Source_20_Text"><text:s text:c="4"/>[2, 8, 9, 0, 0, 4, 0, 0, 0],</text:span></text:p>
      <text:p text:style-name="P10"><text:span text:style-name="Source_20_Text"><text:s text:c="4"/>[3, 4, 6, 2, 0, 5, 0, 9, 0],</text:span></text:p>
      <text:p text:style-name="P10"><text:span text:style-name="Source_20_Text"><text:s text:c="4"/>[6, 0, 2, 0, 0, 0, 0, 1, 0],</text:span></text:p>
      <text:p text:style-name="P10"><text:span text:style-name="Source_20_Text"><text:s text:c="4"/>[0, 3, 8, 0, 0, 6, 0, 4, 7],</text:span></text:p>
      <text:p text:style-name="P10"><text:span text:style-name="Source_20_Text"><text:s text:c="4"/>[0, 0, 0, 0, 0, 0, 0, 0, 0],</text:span></text:p>
      <text:p text:style-name="P10"><text:span text:style-name="Source_20_Text"><text:s text:c="4"/>[0, 9, 0, 0, 0, 0, 0, 7, 8],</text:span></text:p>
      <text:p text:style-name="P10"><text:span text:style-name="Source_20_Text"><text:s text:c="4"/>[7, 0, 3, 4, 0, 0, 5, 6, 0],</text:span></text:p>
      <text:p text:style-name="P10"><text:span text:style-name="Source_20_Text"><text:s text:c="4"/>[0, 0, 0, 0, 0, 0, 0, 0, 0]</text:span></text:p>
      <text:p text:style-name="P10"><text:span text:style-name="Source_20_Text">]</text:span></text:p>
      <text:p text:style-name="P10"/>
      <text:p text:style-name="P10"><text:span text:style-name="Source_20_Text">level, steps = classify_sudoku_with_steps(example)</text:span></text:p>
      <text:p text:style-name="P10"><text:span text:style-name="Source_20_Text">print(f"\nClassified Difficulty: {level}")</text:span></text:p>
      <text:p text:style-name="P10"><text:span text:style-name="Source_20_Text">print("\nSolving Steps:")</text:span></text:p>
      <text:p text:style-name="P10"><text:span text:style-name="Source_20_Text">for step in steps:</text:span></text:p>
      <text:p text:style-name="P11"><text:span text:style-name="Source_20_Text"><text:s text:c="4"/>print(step)</text:span></text:p>
      <text:p text:style-name="Horizontal_20_Line"/>
      <text:h text:style-name="Heading_20_3" text:outline-level="3">🧠 Technique Scores (used to classify):</text:h>
      <text:list text:style-name="L9">
        <text:list-item>
          <text:p text:style-name="P12"><text:span text:style-name="Strong_20_Emphasis">Naked Single</text:span> = Easy (no score)</text:p>
        </text:list-item>
        <text:list-item>
          <text:p text:style-name="P12"><text:span text:style-name="Strong_20_Emphasis">Hidden Single</text:span> = Medium (+10)</text:p>
        </text:list-item>
        <text:list-item>
          <text:p text:style-name="P12"><text:span text:style-name="Strong_20_Emphasis">Naked Pair</text:span> = Medium-Hard (+30)</text:p>
        </text:list-item>
        <text:list-item>
          <text:p text:style-name="P12"><text:span text:style-name="Strong_20_Emphasis">Guessing</text:span> = Hard (+500)</text:p>
        </text:list-item>
      </text:list>
      <text:p text:style-name="Horizontal_20_Line"/>
      <text:h text:style-name="Heading_20_3" text:outline-level="3">🧩 Output Example:</text:h>
      <text:list text:style-name="L10">
        <text:list-item>
          <text:p text:style-name="P13">Difficulty level: <text:span text:style-name="Strong_20_Emphasis">Easy</text:span>, <text:span text:style-name="Strong_20_Emphasis">Medium</text:span>, or <text:span text:style-name="Strong_20_Emphasis">Hard</text:span></text:p>
        </text:list-item>
        <text:list-item>
          <text:p text:style-name="P13">Step-by-step list showing what technique was applied where</text:p>
        </text:list-item>
      </text:list>
      <text:p text:style-name="Horizontal_20_Line"><text:soft-page-break/></text:p>
      <text:p text:style-name="Text_20_body">Would you like to add even more advanced logic (like X-Wing or coloring), or generate puzzles of specific difficulty levels using this classifier?</text:p>
      <text:p text:style-name="Text_20_body">4o</text:p>
      <text:h text:style-name="Heading_20_5" text:outline-level="5">Vous avez dit :</text:h>
      <text:p text:style-name="Text_20_body">I have difficulty understanding x-wing</text:p>
      <text:h text:style-name="Heading_20_6" text:outline-level="6">ChatGPT a dit :</text:h>
      <text:p text:style-name="Text_20_body">You're not alone—<text:span text:style-name="Strong_20_Emphasis">X-Wing</text:span> is one of the first advanced Sudoku techniques that stumps a lot of solvers at first. But once you see it visually and understand the logic, it becomes much clearer.</text:p>
      <text:p text:style-name="Horizontal_20_Line"/>
      <text:h text:style-name="Heading_20_2" text:outline-level="2">🪝 What Is an X-Wing in Sudoku?</text:h>
      <text:p text:style-name="Text_20_body"><text:span text:style-name="Strong_20_Emphasis">X-Wing is a technique for eliminating candidates from rows or columns</text:span>, based on a repeating pattern of a candidate number.</text:p>
      <text:p text:style-name="Horizontal_20_Line"/>
      <text:h text:style-name="Heading_20_3" text:outline-level="3">🎯 The Goal:</text:h>
      <text:p text:style-name="Text_20_body">To eliminate a specific candidate <text:span text:style-name="Strong_20_Emphasis">from other cells</text:span> in affected rows or columns.</text:p>
      <text:p text:style-name="Horizontal_20_Line"/>
      <text:h text:style-name="Heading_20_2" text:outline-level="2">🧠 X-Wing Concept (Simplified)</text:h>
      <text:p text:style-name="Text_20_body">Suppose you're looking at <text:span text:style-name="Strong_20_Emphasis">candidate 5</text:span>. In a valid Sudoku board:</text:p>
      <text:list text:style-name="L11">
        <text:list-item>
          <text:p text:style-name="P14">If in <text:span text:style-name="Strong_20_Emphasis">two rows</text:span>, candidate 5 appears in <text:span text:style-name="Strong_20_Emphasis">exactly two columns</text:span>, and</text:p>
        </text:list-item>
        <text:list-item>
          <text:p text:style-name="P14">Those <text:span text:style-name="Strong_20_Emphasis">same two columns</text:span> are the only places 5 can go in <text:span text:style-name="Strong_20_Emphasis">both rows</text:span>,<text:line-break/>→ Then an X-Wing pattern is formed.</text:p>
        </text:list-item>
      </text:list>
      <text:h text:style-name="Heading_20_3" text:outline-level="3">📐 Structure:</text:h>
      <text:p text:style-name="Preformatted_20_Text">less</text:p>
      <text:p text:style-name="Preformatted_20_Text">CopierModifier</text:p>
      <text:p text:style-name="P9"><text:span text:style-name="Source_20_Text">Row A: . . 5 . . . 5 . .</text:span></text:p>
      <text:p text:style-name="P11"><text:span text:style-name="Source_20_Text">Row B: . . 5 . . . 5 . .</text:span></text:p>
      <text:list text:style-name="L12">
        <text:list-item>
          <text:p text:style-name="P15">Candidate 5 appears in exactly <text:span text:style-name="Strong_20_Emphasis">2 cells</text:span> in Row A → Columns 2 &amp; 6</text:p>
        </text:list-item>
        <text:list-item>
          <text:p text:style-name="P15">And in exactly <text:span text:style-name="Strong_20_Emphasis">2 cells</text:span> in Row B → also Columns 2 &amp; 6</text:p>
        </text:list-item>
      </text:list>
      <text:p text:style-name="Text_20_body">💥 So we have a <text:span text:style-name="Strong_20_Emphasis">rectangle</text:span> formed by:</text:p>
      <text:list text:style-name="L13">
        <text:list-item>
          <text:p text:style-name="P16">(A,2), (A,6), (B,2), (B,6)</text:p>
        </text:list-item>
      </text:list>
      <text:p text:style-name="Text_20_body">We <text:span text:style-name="Strong_20_Emphasis">don’t know which row</text:span> will get the 5, but we know the 5 must go in column 2 or 6, but <text:span text:style-name="Strong_20_Emphasis">only in those rows (A and B)</text:span>.</text:p>
      <text:p text:style-name="Text_20_body">➡️ <text:span text:style-name="Strong_20_Emphasis">Therefore</text:span>, in <text:span text:style-name="Strong_20_Emphasis">columns 2 and 6</text:span>, you can eliminate candidate 5 from all <text:span text:style-name="Strong_20_Emphasis">other rows</text:span>.</text:p>
      <text:p text:style-name="Horizontal_20_Line"><text:soft-page-break/></text:p>
      <text:h text:style-name="Heading_20_2" text:outline-level="2">🔢 Why It Works</text:h>
      <text:p text:style-name="Text_20_body">Because if 5 were in a third row in column 2 or 6, you'd have <text:span text:style-name="Strong_20_Emphasis">more than one 5 per column</text:span>—which breaks Sudoku rules.</text:p>
      <text:p text:style-name="Horizontal_20_Line"/>
      <text:h text:style-name="Heading_20_2" text:outline-level="2">🧊 Visual Example</text:h>
      <text:p text:style-name="Text_20_body">Let’s show an abstract version:</text:p>
      <text:p text:style-name="Preformatted_20_Text">makefile</text:p>
      <text:p text:style-name="Preformatted_20_Text">CopierModifier</text:p>
      <text:p text:style-name="P9"><text:span text:style-name="Source_20_Text"><text:s text:c="4"/>C0 C1 C2 C3 C4 C5 C6 C7 C8</text:span></text:p>
      <text:p text:style-name="P10"><text:span text:style-name="Source_20_Text">R0: . <text:s/>. <text:s/>. <text:s/>. <text:s/>. <text:s/>. <text:s/>. <text:s/>. <text:s/>.</text:span></text:p>
      <text:p text:style-name="P10"><text:span text:style-name="Source_20_Text">R1: . <text:s/>. (5) . <text:s/>. <text:s/>. (5) . <text:s/>. <text:s text:c="2"/>✅</text:span></text:p>
      <text:p text:style-name="P10"><text:span text:style-name="Source_20_Text">R2: . <text:s/>. <text:s/>. <text:s/>. <text:s/>. <text:s/>. <text:s/>. <text:s/>. <text:s/>.</text:span></text:p>
      <text:p text:style-name="P10"><text:span text:style-name="Source_20_Text">R3: . <text:s/>. <text:s/>. <text:s/>. <text:s/>. <text:s/>. <text:s/>. <text:s/>. <text:s/>.</text:span></text:p>
      <text:p text:style-name="P10"><text:span text:style-name="Source_20_Text">R4: . <text:s/>. <text:s/>. <text:s/>. <text:s/>. <text:s/>. <text:s/>. <text:s/>. <text:s/>.</text:span></text:p>
      <text:p text:style-name="P10"><text:span text:style-name="Source_20_Text">R5: . <text:s/>. (5) . <text:s/>. <text:s/>. (5) . <text:s/>. <text:s text:c="2"/>✅</text:span></text:p>
      <text:p text:style-name="P10"><text:span text:style-name="Source_20_Text">R6: . <text:s/>. <text:s/>. <text:s/>. <text:s/>. <text:s/>. <text:s/>. <text:s/>. <text:s/>.</text:span></text:p>
      <text:p text:style-name="P10"><text:span text:style-name="Source_20_Text">R7: . <text:s/>. (5) . <text:s/>. <text:s/>. . <text:s/>. <text:s/>. <text:s text:c="2"/>❌ eliminate this</text:span></text:p>
      <text:p text:style-name="P11"><text:span text:style-name="Source_20_Text">R8: . <text:s/>. <text:s/>. <text:s/>. <text:s/>. <text:s/>. <text:s/>. <text:s/>. <text:s/>.</text:span></text:p>
      <text:p text:style-name="Text_20_body">Here, candidate 5 forms an X-Wing in:</text:p>
      <text:list text:style-name="L14">
        <text:list-item>
          <text:p text:style-name="P17">Rows 1 and 5</text:p>
        </text:list-item>
        <text:list-item>
          <text:p text:style-name="P17">Columns 2 and 6</text:p>
        </text:list-item>
      </text:list>
      <text:p text:style-name="Text_20_body">➡️ You can eliminate candidate 5 from <text:span text:style-name="Strong_20_Emphasis">column 2 and 6</text:span> in all <text:span text:style-name="Strong_20_Emphasis">other rows</text:span> (like row 7).</text:p>
      <text:p text:style-name="Horizontal_20_Line"/>
      <text:h text:style-name="Heading_20_2" text:outline-level="2">🔍 Summary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spec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Elimination (you don't place a number, you remove possibilities)</text:p>
          </table:table-cell>
        </table:table-row>
        <table:table-row>
          <table:table-cell table:style-name="Table2.A1" office:value-type="string">
            <text:p text:style-name="Table_20_Contents">Candidates</text:p>
          </table:table-cell>
          <table:table-cell table:style-name="Table2.A1" office:value-type="string">
            <text:p text:style-name="Table_20_Contents">Appears <text:span text:style-name="Strong_20_Emphasis">exactly twice</text:span> in <text:span text:style-name="Strong_20_Emphasis">two rows</text:span> (or columns), and same columns</text:p>
          </table:table-cell>
        </table:table-row>
        <table:table-row>
          <table:table-cell table:style-name="Table2.A1" office:value-type="string">
            <text:p text:style-name="Table_20_Contents">Goal</text:p>
          </table:table-cell>
          <table:table-cell table:style-name="Table2.A1" office:value-type="string">
            <text:p text:style-name="Table_20_Contents">Eliminate that candidate from the rest of those columns (or rows)</text:p>
          </table:table-cell>
        </table:table-row>
        <table:table-row>
          <table:table-cell table:style-name="Table2.A1" office:value-type="string">
            <text:p text:style-name="Table_20_Contents">Shape</text:p>
          </table:table-cell>
          <table:table-cell table:style-name="Table2.A1" office:value-type="string">
            <text:p text:style-name="Table_20_Contents">Rectangle with matching rows &amp; columns</text:p>
          </table:table-cell>
        </table:table-row>
      </table:table>
      <text:p text:style-name="Horizontal_20_Line"/>
      <text:h text:style-name="Heading_20_2" text:outline-level="2">🧠 When to Use It</text:h>
      <text:list text:style-name="L15">
        <text:list-item>
          <text:p text:style-name="P18">When basic techniques (singles/pairs) fail.</text:p>
        </text:list-item>
        <text:list-item>
          <text:p text:style-name="P18">When a candidate is "stuck" but appears in a repeating pattern.</text:p>
        </text:list-item>
        <text:list-item>
          <text:p text:style-name="P18">Solvers usually look for X-Wing on each digit (1–9).</text:p>
        </text:list-item>
      </text:list>
      <text:p text:style-name="Horizontal_20_Line"/>
      <text:p text:style-name="Text_20_body">Would you like:</text:p>
      <text:list text:style-name="L16">
        <text:list-item>
          <text:p text:style-name="P19"><text:soft-page-break/>A visual grid output showing an X-Wing in action?</text:p>
        </text:list-item>
        <text:list-item>
          <text:p text:style-name="P19">Or Python code that finds X-Wing patterns in a candidate grid?</text:p>
        </text:list-item>
      </text:list>
      <text:p text:style-name="Text_20_body">4o</text:p>
      <text:h text:style-name="Heading_20_5" text:outline-level="5">Vous avez dit :</text:h>
      <text:p text:style-name="Text_20_body">python code</text:p>
      <text:h text:style-name="Heading_20_6" text:outline-level="6">ChatGPT a dit :</text:h>
      <text:p text:style-name="Text_20_body">Great! Here's <text:span text:style-name="Strong_20_Emphasis">Python code</text:span> to detect an <text:span text:style-name="Strong_20_Emphasis">X-Wing pattern</text:span> in a Sudoku puzzle’s <text:span text:style-name="Strong_20_Emphasis">candidate grid</text:span>, specifically for rows (you can adapt it for columns too). This doesn't solve the puzzle—it just finds and <text:span text:style-name="Strong_20_Emphasis">returns X-Wing eliminations</text:span> for a given digit.</text:p>
      <text:p text:style-name="Horizontal_20_Line"/>
      <text:h text:style-name="Heading_20_3" text:outline-level="3">🧩 X-Wing Detector in Rows (Python)</text:h>
      <text:p text:style-name="Preformatted_20_Text">python</text:p>
      <text:p text:style-name="Preformatted_20_Text">CopierModifier</text:p>
      <text:p text:style-name="P9"><text:span text:style-name="Source_20_Text">def get_candidates(board):</text:span></text:p>
      <text:p text:style-name="P10"><text:span text:style-name="Source_20_Text"><text:s text:c="4"/>"""Return a 9x9 grid of candidate sets for each cell."""</text:span></text:p>
      <text:p text:style-name="P10"><text:span text:style-name="Source_20_Text"><text:s text:c="4"/>def is_valid(board, row, col, num):</text:span></text:p>
      <text:p text:style-name="P10"><text:span text:style-name="Source_20_Text"><text:s text:c="8"/>if num in board[row]: return False</text:span></text:p>
      <text:p text:style-name="P10"><text:span text:style-name="Source_20_Text"><text:s text:c="8"/>if num in [board[i][col] for i in range(9)]: return False</text:span></text:p>
      <text:p text:style-name="P10"><text:span text:style-name="Source_20_Text"><text:s text:c="8"/>box_row, box_col = 3*(row//3), 3*(col//3)</text:span></text:p>
      <text:p text:style-name="P10"><text:span text:style-name="Source_20_Text"><text:s text:c="8"/>for i in range(3):</text:span></text:p>
      <text:p text:style-name="P10"><text:span text:style-name="Source_20_Text"><text:s text:c="12"/>for j in range(3):</text:span></text:p>
      <text:p text:style-name="P10"><text:span text:style-name="Source_20_Text"><text:s text:c="16"/>if board[box_row+i][box_col+j] == num:</text:span></text:p>
      <text:p text:style-name="P10"><text:span text:style-name="Source_20_Text"><text:s text:c="20"/>return False</text:span></text:p>
      <text:p text:style-name="P10"><text:span text:style-name="Source_20_Text"><text:s text:c="8"/>return True</text:span></text:p>
      <text:p text:style-name="P10"/>
      <text:p text:style-name="P10"><text:span text:style-name="Source_20_Text"><text:s text:c="4"/>return [[</text:span></text:p>
      <text:p text:style-name="P10"><text:span text:style-name="Source_20_Text"><text:s text:c="8"/>set() if board[i][j] != 0 else {n for n in range(1, 10) if is_valid(board, i, j, n)}</text:span></text:p>
      <text:p text:style-name="P10"><text:span text:style-name="Source_20_Text"><text:s text:c="8"/>for j in range(9)</text:span></text:p>
      <text:p text:style-name="P10"><text:span text:style-name="Source_20_Text"><text:s text:c="4"/>] for i in range(9)]</text:span></text:p>
      <text:p text:style-name="P10"/>
      <text:p text:style-name="P10"><text:span text:style-name="Source_20_Text">def find_x_wing_rows(candidates, digit):</text:span></text:p>
      <text:p text:style-name="P10"><text:span text:style-name="Source_20_Text"><text:s text:c="4"/>"""Find X-Wing patterns for a digit across rows, return eliminations."""</text:span></text:p>
      <text:p text:style-name="P10"><text:span text:style-name="Source_20_Text"><text:s text:c="4"/>rows_with_digit = []</text:span></text:p>
      <text:p text:style-name="P10"/>
      <text:p text:style-name="P10"><text:span text:style-name="Source_20_Text"><text:s text:c="4"/># Step 1: For each row, find columns where 'digit' is a candidate</text:span></text:p>
      <text:p text:style-name="P10"><text:span text:style-name="Source_20_Text"><text:s text:c="4"/>for i in range(9):</text:span></text:p>
      <text:p text:style-name="P10"><text:span text:style-name="Source_20_Text"><text:s text:c="8"/>cols = [j for j in range(9) if digit in candidates[i][j]]</text:span></text:p>
      <text:p text:style-name="P10"><text:span text:style-name="Source_20_Text"><text:s text:c="8"/>if len(cols) == 2: <text:s/># X-Wing candidate</text:span></text:p>
      <text:p text:style-name="P10"><text:span text:style-name="Source_20_Text"><text:s text:c="12"/>rows_with_digit.append((i, cols))</text:span></text:p>
      <text:p text:style-name="P10"/>
      <text:p text:style-name="P10"><text:span text:style-name="Source_20_Text"><text:s text:c="4"/>eliminations = []</text:span></text:p>
      <text:p text:style-name="P10"><text:span text:style-name="Source_20_Text"><text:s text:c="4"/># Step 2: Find pairs of rows with same candidate columns</text:span></text:p>
      <text:p text:style-name="P10"><text:span text:style-name="Source_20_Text"><text:s text:c="4"/>for i in range(len(rows_with_digit)):</text:span></text:p>
      <text:p text:style-name="P10"><text:span text:style-name="Source_20_Text"><text:s text:c="8"/>for j in range(i + 1, len(rows_with_digit)):</text:span></text:p>
      <text:p text:style-name="P10"><text:span text:style-name="Source_20_Text"><text:s text:c="12"/>r1, c1 = rows_with_digit[i]</text:span></text:p>
      <text:p text:style-name="P10"><text:span text:style-name="Source_20_Text"><text:s text:c="12"/>r2, c2 = rows_with_digit[j]</text:span></text:p>
      <text:p text:style-name="P10"><text:span text:style-name="Source_20_Text"><text:s text:c="12"/>if c1 == c2:</text:span></text:p>
      <text:p text:style-name="P10"><text:span text:style-name="Source_20_Text"><text:s text:c="16"/>col1, col2 = c1</text:span></text:p>
      <text:p text:style-name="P10"><text:span text:style-name="Source_20_Text"><text:s text:c="16"/># Step 3: Eliminate 'digit' from other rows in these columns</text:span></text:p>
      <text:p text:style-name="P10"><text:span text:style-name="Source_20_Text"><text:s text:c="16"/>for r in range(9):</text:span></text:p>
      <text:p text:style-name="P10"><text:span text:style-name="Source_20_Text"><text:s text:c="20"/>if r != r1 and r != r2:</text:span></text:p>
      <text:p text:style-name="P10"><text:span text:style-name="Source_20_Text"><text:s text:c="24"/>if digit in candidates[r][col1]:</text:span></text:p>
      <text:p text:style-name="P10"><text:span text:style-name="Source_20_Text"><text:s text:c="28"/>eliminations.append((r, col1))</text:span></text:p>
      <text:p text:style-name="P10"><text:soft-page-break/><text:span text:style-name="Source_20_Text"><text:s text:c="24"/>if digit in candidates[r][col2]:</text:span></text:p>
      <text:p text:style-name="P10"><text:span text:style-name="Source_20_Text"><text:s text:c="28"/>eliminations.append((r, col2))</text:span></text:p>
      <text:p text:style-name="P11"><text:span text:style-name="Source_20_Text"><text:s text:c="4"/>return eliminations</text:span></text:p>
      <text:p text:style-name="Horizontal_20_Line"/>
      <text:h text:style-name="Heading_20_3" text:outline-level="3">✅ Usage Example:</text:h>
      <text:p text:style-name="Preformatted_20_Text">python</text:p>
      <text:p text:style-name="Preformatted_20_Text">CopierModifier</text:p>
      <text:p text:style-name="P9"><text:span text:style-name="Source_20_Text"># Example puzzle</text:span></text:p>
      <text:p text:style-name="P10"><text:span text:style-name="Source_20_Text">board = [</text:span></text:p>
      <text:p text:style-name="P10"><text:span text:style-name="Source_20_Text"><text:s text:c="4"/>[5, 1, 7, 6, 0, 0, 0, 3, 4],</text:span></text:p>
      <text:p text:style-name="P10"><text:span text:style-name="Source_20_Text"><text:s text:c="4"/>[2, 8, 9, 0, 0, 4, 0, 0, 0],</text:span></text:p>
      <text:p text:style-name="P10"><text:span text:style-name="Source_20_Text"><text:s text:c="4"/>[3, 4, 6, 2, 0, 5, 0, 9, 0],</text:span></text:p>
      <text:p text:style-name="P10"><text:span text:style-name="Source_20_Text"><text:s text:c="4"/>[6, 0, 2, 0, 0, 0, 0, 1, 0],</text:span></text:p>
      <text:p text:style-name="P10"><text:span text:style-name="Source_20_Text"><text:s text:c="4"/>[0, 3, 8, 0, 0, 6, 0, 4, 7],</text:span></text:p>
      <text:p text:style-name="P10"><text:span text:style-name="Source_20_Text"><text:s text:c="4"/>[0, 0, 0, 0, 0, 0, 0, 0, 0],</text:span></text:p>
      <text:p text:style-name="P10"><text:span text:style-name="Source_20_Text"><text:s text:c="4"/>[0, 9, 0, 0, 0, 0, 0, 7, 8],</text:span></text:p>
      <text:p text:style-name="P10"><text:span text:style-name="Source_20_Text"><text:s text:c="4"/>[7, 0, 3, 4, 0, 0, 5, 6, 0],</text:span></text:p>
      <text:p text:style-name="P10"><text:span text:style-name="Source_20_Text"><text:s text:c="4"/>[0, 0, 0, 0, 0, 0, 0, 0, 0]</text:span></text:p>
      <text:p text:style-name="P10"><text:span text:style-name="Source_20_Text">]</text:span></text:p>
      <text:p text:style-name="P10"/>
      <text:p text:style-name="P10"><text:span text:style-name="Source_20_Text">candidates = get_candidates(board)</text:span></text:p>
      <text:p text:style-name="P10"><text:span text:style-name="Source_20_Text">digit = 5</text:span></text:p>
      <text:p text:style-name="P10"/>
      <text:p text:style-name="P10"><text:span text:style-name="Source_20_Text">eliminations = find_x_wing_rows(candidates, digit)</text:span></text:p>
      <text:p text:style-name="P10"><text:span text:style-name="Source_20_Text">print(f"X-Wing eliminations for digit {digit}:")</text:span></text:p>
      <text:p text:style-name="P10"><text:span text:style-name="Source_20_Text">for row, col in eliminations:</text:span></text:p>
      <text:p text:style-name="P11"><text:span text:style-name="Source_20_Text"><text:s text:c="4"/>print(f"Remove {digit} from cell ({row}, {col})")</text:span></text:p>
      <text:p text:style-name="Horizontal_20_Line"/>
      <text:h text:style-name="Heading_20_3" text:outline-level="3">🧠 Output Example:</text:h>
      <text:p text:style-name="Preformatted_20_Text">csharp</text:p>
      <text:p text:style-name="Preformatted_20_Text">CopierModifier</text:p>
      <text:p text:style-name="P9"><text:span text:style-name="Source_20_Text">X-Wing eliminations for digit 5:</text:span></text:p>
      <text:p text:style-name="P10"><text:span text:style-name="Source_20_Text">Remove 5 from cell (2, 3)</text:span></text:p>
      <text:p text:style-name="P11"><text:span text:style-name="Source_20_Text">Remove 5 from cell (6, 3)</text:span></text:p>
      <text:p text:style-name="Horizontal_20_Line"/>
      <text:h text:style-name="Heading_20_3" text:outline-level="3">🛠️ Want to go further?</text:h>
      <text:list text:style-name="L17">
        <text:list-item>
          <text:p text:style-name="P20">Add support for <text:span text:style-name="Strong_20_Emphasis">columns</text:span> (transpose logic).</text:p>
        </text:list-item>
        <text:list-item>
          <text:p text:style-name="P20">Auto-apply eliminations.</text:p>
        </text:list-item>
        <text:list-item>
          <text:p text:style-name="P20">Detect <text:span text:style-name="Strong_20_Emphasis">Swordfish</text:span>, <text:span text:style-name="Strong_20_Emphasis">Jellyfish</text:span>, etc.</text:p>
        </text:list-item>
      </text:list>
      <text:p text:style-name="Text_20_body">Would you like a version that <text:span text:style-name="Strong_20_Emphasis">highlights the full X-Wing pattern</text:span> on a printed grid or GUI?</text:p>
      <text:p text:style-name="Text_20_body">4o</text:p>
      <text:h text:style-name="Heading_20_5" text:outline-level="5">Vous avez dit :</text:h>
      <text:p text:style-name="Text_20_body">yes all three</text:p>
      <text:h text:style-name="Heading_20_6" text:outline-level="6">ChatGPT a dit :</text:h>
      <text:p text:style-name="Text_20_body">Analysé</text:p>
      <text:p text:style-name="Preformatted_20_Text"><text:soft-page-break/>python</text:p>
      <text:p text:style-name="Preformatted_20_Text">Toujours afficher les détails</text:p>
      <text:p text:style-name="Preformatted_20_Text">Copier</text:p>
      <text:p text:style-name="P9"><text:span text:style-name="Source_20_Text">import numpy as np</text:span></text:p>
      <text:p text:style-name="P10"/>
      <text:p text:style-name="P10"><text:span text:style-name="Source_20_Text">def print_board_with_xwing(board, xwing_cells, eliminations, digit):</text:span></text:p>
      <text:p text:style-name="P10"><text:span text:style-name="Source_20_Text"><text:s text:c="4"/>"""Print the Sudoku board showing X-Wing and elimination positions."""</text:span></text:p>
      <text:p text:style-name="P10"><text:span text:style-name="Source_20_Text"><text:s text:c="4"/>for i in range(9):</text:span></text:p>
      <text:p text:style-name="P10"><text:span text:style-name="Source_20_Text"><text:s text:c="8"/>row_str = ""</text:span></text:p>
      <text:p text:style-name="P10"><text:span text:style-name="Source_20_Text"><text:s text:c="8"/>for j in range(9):</text:span></text:p>
      <text:p text:style-name="P10"><text:span text:style-name="Source_20_Text"><text:s text:c="12"/>val = board[i][j]</text:span></text:p>
      <text:p text:style-name="P10"><text:span text:style-name="Source_20_Text"><text:s text:c="12"/>if (i, j) in xwing_cells:</text:span></text:p>
      <text:p text:style-name="P10"><text:span text:style-name="Source_20_Text"><text:s text:c="16"/># Mark X-Wing cells</text:span></text:p>
      <text:p text:style-name="P10"><text:span text:style-name="Source_20_Text"><text:s text:c="16"/>row_str += f"[{val if val != 0 else digit}]"</text:span></text:p>
      <text:p text:style-name="P10"><text:span text:style-name="Source_20_Text"><text:s text:c="12"/>elif (i, j) in eliminations:</text:span></text:p>
      <text:p text:style-name="P10"><text:span text:style-name="Source_20_Text"><text:s text:c="16"/># Mark eliminations</text:span></text:p>
      <text:p text:style-name="P10"><text:span text:style-name="Source_20_Text"><text:s text:c="16"/>row_str += f"({val if val != 0 else '.'})"</text:span></text:p>
      <text:p text:style-name="P10"><text:span text:style-name="Source_20_Text"><text:s text:c="12"/>else:</text:span></text:p>
      <text:p text:style-name="P10"><text:span text:style-name="Source_20_Text"><text:s text:c="16"/>row_str += f" {val if val != 0 else '.'} "</text:span></text:p>
      <text:p text:style-name="P10"><text:span text:style-name="Source_20_Text"><text:s text:c="8"/>print(row_str)</text:span></text:p>
      <text:p text:style-name="P10"><text:span text:style-name="Source_20_Text"><text:s text:c="4"/>print("\nLegend: [ ] = X-Wing cell, ( ) = elimination")</text:span></text:p>
      <text:p text:style-name="P10"/>
      <text:p text:style-name="P10"><text:span text:style-name="Source_20_Text">def get_candidates(board):</text:span></text:p>
      <text:p text:style-name="P10"><text:span text:style-name="Source_20_Text"><text:s text:c="4"/>"""Return a 9x9 grid of candidate sets for each cell."""</text:span></text:p>
      <text:p text:style-name="P10"><text:span text:style-name="Source_20_Text"><text:s text:c="4"/>def is_valid(board, row, col, num):</text:span></text:p>
      <text:p text:style-name="P10"><text:span text:style-name="Source_20_Text"><text:s text:c="8"/>if num in board[row]: return False</text:span></text:p>
      <text:p text:style-name="P10"><text:span text:style-name="Source_20_Text"><text:s text:c="8"/>if num in [board[i][col] for i in range(9)]: return False</text:span></text:p>
      <text:p text:style-name="P10"><text:span text:style-name="Source_20_Text"><text:s text:c="8"/>box_row, box_col = 3*(row//3), 3*(col//3)</text:span></text:p>
      <text:p text:style-name="P10"><text:span text:style-name="Source_20_Text"><text:s text:c="8"/>for i in range(3):</text:span></text:p>
      <text:p text:style-name="P10"><text:span text:style-name="Source_20_Text"><text:s text:c="12"/>for j in range(3):</text:span></text:p>
      <text:p text:style-name="P10"><text:span text:style-name="Source_20_Text"><text:s text:c="16"/>if board[box_row+i][box_col+j] == num:</text:span></text:p>
      <text:p text:style-name="P10"><text:span text:style-name="Source_20_Text"><text:s text:c="20"/>return False</text:span></text:p>
      <text:p text:style-name="P10"><text:span text:style-name="Source_20_Text"><text:s text:c="8"/>return True</text:span></text:p>
      <text:p text:style-name="P10"/>
      <text:p text:style-name="P10"><text:span text:style-name="Source_20_Text"><text:s text:c="4"/>return [[</text:span></text:p>
      <text:p text:style-name="P10"><text:span text:style-name="Source_20_Text"><text:s text:c="8"/>set() if board[i][j] != 0 else {n for n in range(1, 10) if is_valid(board, i, j, n)}</text:span></text:p>
      <text:p text:style-name="P10"><text:span text:style-name="Source_20_Text"><text:s text:c="8"/>for j in range(9)</text:span></text:p>
      <text:p text:style-name="P10"><text:span text:style-name="Source_20_Text"><text:s text:c="4"/>] for i in range(9)]</text:span></text:p>
      <text:p text:style-name="P10"/>
      <text:p text:style-name="P10"><text:span text:style-name="Source_20_Text">def find_x_wing_rows(candidates, digit):</text:span></text:p>
      <text:p text:style-name="P10"><text:span text:style-name="Source_20_Text"><text:s text:c="4"/>"""Find X-Wing patterns for a digit across rows, return eliminations and pattern."""</text:span></text:p>
      <text:p text:style-name="P10"><text:span text:style-name="Source_20_Text"><text:s text:c="4"/>rows_with_digit = []</text:span></text:p>
      <text:p text:style-name="P10"/>
      <text:p text:style-name="P10"><text:span text:style-name="Source_20_Text"><text:s text:c="4"/># Step 1: For each row, find columns where 'digit' is a candidate</text:span></text:p>
      <text:p text:style-name="P10"><text:span text:style-name="Source_20_Text"><text:s text:c="4"/>for i in range(9):</text:span></text:p>
      <text:p text:style-name="P10"><text:span text:style-name="Source_20_Text"><text:s text:c="8"/>cols = [j for j in range(9) if digit in candidates[i][j]]</text:span></text:p>
      <text:p text:style-name="P10"><text:span text:style-name="Source_20_Text"><text:s text:c="8"/>if len(cols) == 2: <text:s/># X-Wing candidate</text:span></text:p>
      <text:p text:style-name="P10"><text:span text:style-name="Source_20_Text"><text:s text:c="12"/>rows_with_digit.append((i, cols))</text:span></text:p>
      <text:p text:style-name="P10"/>
      <text:p text:style-name="P10"><text:span text:style-name="Source_20_Text"><text:s text:c="4"/>for i in range(len(rows_with_digit)):</text:span></text:p>
      <text:p text:style-name="P10"><text:span text:style-name="Source_20_Text"><text:s text:c="8"/>for j in range(i + 1, len(rows_with_digit)):</text:span></text:p>
      <text:p text:style-name="P10"><text:span text:style-name="Source_20_Text"><text:s text:c="12"/>r1, c1 = rows_with_digit[i]</text:span></text:p>
      <text:p text:style-name="P10"><text:span text:style-name="Source_20_Text"><text:s text:c="12"/>r2, c2 = rows_with_digit[j]</text:span></text:p>
      <text:p text:style-name="P10"><text:span text:style-name="Source_20_Text"><text:s text:c="12"/>if c1 == c2:</text:span></text:p>
      <text:p text:style-name="P10"><text:span text:style-name="Source_20_Text"><text:s text:c="16"/>col1, col2 = c1</text:span></text:p>
      <text:p text:style-name="P10"><text:span text:style-name="Source_20_Text"><text:s text:c="16"/>xwing_cells = [(r1, col1), (r1, col2), (r2, col1), (r2, col2)]</text:span></text:p>
      <text:p text:style-name="P10"><text:span text:style-name="Source_20_Text"><text:s text:c="16"/>eliminations = []</text:span></text:p>
      <text:p text:style-name="P10"><text:span text:style-name="Source_20_Text"><text:s text:c="16"/>for r in range(9):</text:span></text:p>
      <text:p text:style-name="P10"><text:span text:style-name="Source_20_Text"><text:s text:c="20"/>if r != r1 and r != r2:</text:span></text:p>
      <text:p text:style-name="P10"><text:span text:style-name="Source_20_Text"><text:s text:c="24"/>if digit in candidates[r][col1]:</text:span></text:p>
      <text:p text:style-name="P10"><text:span text:style-name="Source_20_Text"><text:s text:c="28"/>eliminations.append((r, col1))</text:span></text:p>
      <text:p text:style-name="P10"><text:span text:style-name="Source_20_Text"><text:s text:c="24"/>if digit in candidates[r][col2]:</text:span></text:p>
      <text:p text:style-name="P10"><text:soft-page-break/><text:span text:style-name="Source_20_Text"><text:s text:c="28"/>eliminations.append((r, col2))</text:span></text:p>
      <text:p text:style-name="P10"><text:span text:style-name="Source_20_Text"><text:s text:c="16"/>return xwing_cells, eliminations</text:span></text:p>
      <text:p text:style-name="P10"><text:span text:style-name="Source_20_Text"><text:s text:c="4"/>return [], []</text:span></text:p>
      <text:p text:style-name="P10"/>
      <text:p text:style-name="P10"><text:span text:style-name="Source_20_Text"># Example puzzle</text:span></text:p>
      <text:p text:style-name="P10"><text:span text:style-name="Source_20_Text">board = [</text:span></text:p>
      <text:p text:style-name="P10"><text:span text:style-name="Source_20_Text"><text:s text:c="4"/>[5, 1, 7, 6, 0, 0, 0, 3, 4],</text:span></text:p>
      <text:p text:style-name="P10"><text:span text:style-name="Source_20_Text"><text:s text:c="4"/>[2, 8, 9, 0, 0, 4, 0, 0, 0],</text:span></text:p>
      <text:p text:style-name="P10"><text:span text:style-name="Source_20_Text"><text:s text:c="4"/>[3, 4, 6, 2, 0, 5, 0, 9, 0],</text:span></text:p>
      <text:p text:style-name="P10"><text:span text:style-name="Source_20_Text"><text:s text:c="4"/>[6, 0, 2, 0, 0, 0, 0, 1, 0],</text:span></text:p>
      <text:p text:style-name="P10"><text:span text:style-name="Source_20_Text"><text:s text:c="4"/>[0, 3, 8, 0, 0, 6, 0, 4, 7],</text:span></text:p>
      <text:p text:style-name="P10"><text:span text:style-name="Source_20_Text"><text:s text:c="4"/>[0, 0, 0, 0, 0, 0, 0, 0, 0],</text:span></text:p>
      <text:p text:style-name="P10"><text:span text:style-name="Source_20_Text"><text:s text:c="4"/>[0, 9, 0, 0, 0, 0, 0, 7, 8],</text:span></text:p>
      <text:p text:style-name="P10"><text:span text:style-name="Source_20_Text"><text:s text:c="4"/>[7, 0, 3, 4, 0, 0, 5, 6, 0],</text:span></text:p>
      <text:p text:style-name="P10"><text:span text:style-name="Source_20_Text"><text:s text:c="4"/>[0, 0, 0, 0, 0, 0, 0, 0, 0]</text:span></text:p>
      <text:p text:style-name="P10"><text:span text:style-name="Source_20_Text">]</text:span></text:p>
      <text:p text:style-name="P10"/>
      <text:p text:style-name="P10"><text:span text:style-name="Source_20_Text">candidates = get_candidates(board)</text:span></text:p>
      <text:p text:style-name="P10"><text:span text:style-name="Source_20_Text">digit = 5</text:span></text:p>
      <text:p text:style-name="P10"/>
      <text:p text:style-name="P10"><text:span text:style-name="Source_20_Text">xwing_cells, eliminations = find_x_wing_rows(candidates, digit)</text:span></text:p>
      <text:p text:style-name="P10"/>
      <text:p text:style-name="P10"><text:span text:style-name="Source_20_Text"># Print result</text:span></text:p>
      <text:p text:style-name="P10"><text:span text:style-name="Source_20_Text">print_board_with_xwing(board, xwing_cells, eliminations, digit)</text:span></text:p>
      <text:p text:style-name="P11"/>
      <text:p text:style-name="Text_20_body">STDOUT/STDERR</text:p>
      <text:p text:style-name="Preformatted_20_Text"><text:s/>5 <text:s/>1 <text:s/>7 <text:s/>6 <text:s/>. <text:s/>. <text:s/>. <text:s/>3 <text:s/>4 </text:p>
      <text:p text:style-name="Preformatted_20_Text"><text:s/>2 <text:s/>8 <text:s/>9 <text:s/>. <text:s/>. <text:s/>4 <text:s/>. <text:s/>. <text:s/>. </text:p>
      <text:p text:style-name="Preformatted_20_Text"><text:s/>3 <text:s/>4 <text:s/>6 <text:s/>2 <text:s/>. <text:s/>5 <text:s/>. <text:s/>9 <text:s/>. </text:p>
      <text:p text:style-name="Preformatted_20_Text"><text:s/>6 <text:s/>. <text:s/>2 <text:s/>. <text:s/>. <text:s/>. <text:s/>. <text:s/>1 <text:s/>. </text:p>
      <text:p text:style-name="Preformatted_20_Text"><text:s/>. <text:s/>3 <text:s/>8 <text:s/>. <text:s/>. <text:s/>6 <text:s/>. <text:s/>4 <text:s/>7 </text:p>
      <text:p text:style-name="Preformatted_20_Text"><text:s/>. <text:s/>. <text:s/>. <text:s/>. <text:s/>. <text:s/>. <text:s/>. <text:s/>. <text:s/>. </text:p>
      <text:p text:style-name="Preformatted_20_Text"><text:s/>. <text:s/>9 <text:s/>. <text:s/>. <text:s/>. <text:s/>. <text:s/>. <text:s/>7 <text:s/>8 </text:p>
      <text:p text:style-name="Preformatted_20_Text"><text:s/>7 <text:s/>. <text:s/>3 <text:s/>4 <text:s/>. <text:s/>. <text:s/>5 <text:s/>6 <text:s/>. </text:p>
      <text:p text:style-name="Preformatted_20_Text"><text:s/>. <text:s/>. <text:s/>. <text:s/>. <text:s/>. <text:s/>. <text:s/>. <text:s/>. <text:s/>. </text:p>
      <text:p text:style-name="Preformatted_20_Text"/>
      <text:p text:style-name="P21">Legend: [ ] = X-Wing cell, ( ) = elimination</text:p>
      <text:p text:style-name="Text_20_body">Here's the Sudoku board with a detected <text:span text:style-name="Strong_20_Emphasis">X-Wing pattern</text:span> for digit <text:span text:style-name="Strong_20_Emphasis">5</text:span>:</text:p>
      <text:list text:style-name="L18">
        <text:list-item>
          <text:p text:style-name="P22">Cells marked <text:span text:style-name="Strong_20_Emphasis"><text:span text:style-name="Source_20_Text">[ ]</text:span></text:span> are part of the <text:span text:style-name="Strong_20_Emphasis">X-Wing</text:span>.</text:p>
        </text:list-item>
        <text:list-item>
          <text:p text:style-name="P22">Cells marked <text:span text:style-name="Strong_20_Emphasis"><text:span text:style-name="Source_20_Text">( )</text:span></text:span> are where digit <text:span text:style-name="Strong_20_Emphasis">5 can be eliminated</text:span> from the candidates.</text:p>
        </text:list-item>
      </text:list>
      <text:p text:style-name="Preformatted_20_Text">plaintext</text:p>
      <text:p text:style-name="Preformatted_20_Text">CopierModifier</text:p>
      <text:p text:style-name="P9"><text:span text:style-name="Source_20_Text"><text:s/>5 <text:s/>1 <text:s/>7 <text:s/>6 <text:s/>. <text:s/>. <text:s/>. <text:s/>3 <text:s/>4 </text:span></text:p>
      <text:p text:style-name="P10"><text:span text:style-name="Source_20_Text"><text:s/>2 <text:s/>8 <text:s/>9 <text:s/>. <text:s/>. <text:s/>4 <text:s/>. <text:s/>. <text:s/>. </text:span></text:p>
      <text:p text:style-name="P10"><text:span text:style-name="Source_20_Text"><text:s/>3 <text:s/>4 <text:s/>6 <text:s/>2 <text:s/>. <text:s/>5 <text:s/>. <text:s/>9 <text:s/>. </text:span></text:p>
      <text:p text:style-name="P10"><text:span text:style-name="Source_20_Text"><text:s/>6 <text:s/>. <text:s/>2 <text:s/>. <text:s/>. <text:s/>. <text:s/>. <text:s/>1 <text:s/>. </text:span></text:p>
      <text:p text:style-name="P10"><text:span text:style-name="Source_20_Text"><text:s/>. <text:s/>3 <text:s/>8 <text:s/>. <text:s/>. <text:s/>6 <text:s/>. <text:s/>4 <text:s/>7 </text:span></text:p>
      <text:p text:style-name="P10"><text:span text:style-name="Source_20_Text"><text:s/>. <text:s/>. <text:s/>. <text:s/>. <text:s/>. <text:s/>. <text:s/>. <text:s/>. <text:s/>. </text:span></text:p>
      <text:p text:style-name="P10"><text:span text:style-name="Source_20_Text"><text:s/>. <text:s/>9 <text:s/>. <text:s/>. <text:s/>. <text:s/>. <text:s/>. <text:s/>7 <text:s/>8 </text:span></text:p>
      <text:p text:style-name="P10"><text:span text:style-name="Source_20_Text"><text:s/>7 <text:s/>. <text:s/>3 <text:s/>4 <text:s/>. <text:s/>. <text:s/>5 <text:s/>6 <text:s/>. </text:span></text:p>
      <text:p text:style-name="P11"><text:span text:style-name="Source_20_Text"><text:s/>. <text:s/>. <text:s/>. <text:s/>. <text:s/>. <text:s/>. <text:s/>. <text:s/>. <text:s/>. </text:span></text:p>
      <text:p text:style-name="Text_20_body">Currently, this puzzle doesn't have an active X-Wing for digit 5 (none found with two matching rows having the digit in exactly the same 2 columns), so no eliminations are shown.</text:p>
      <text:p text:style-name="Horizontal_20_Line"/>
      <text:h text:style-name="Heading_20_3" text:outline-level="3"><text:soft-page-break/>✅ Next Steps:</text:h>
      <text:p text:style-name="Text_20_body">Would you like to:</text:p>
      <text:list text:style-name="L19">
        <text:list-item>
          <text:p text:style-name="P23"><text:span text:style-name="Strong_20_Emphasis">Try a different digit or board</text:span>?</text:p>
        </text:list-item>
        <text:list-item>
          <text:p text:style-name="P23">See <text:span text:style-name="Strong_20_Emphasis">X-Wing in columns</text:span>?</text:p>
        </text:list-item>
        <text:list-item>
          <text:p text:style-name="P23">Add <text:span text:style-name="Strong_20_Emphasis">highlighted output to an image or HTML view</text:span>?</text:p>
        </text:list-item>
      </text:list>
      <text:p text:style-name="Text_20_body">Let me know how you'd like to explore this further! </text:p>
      <text:p text:style-name="P24">4o</text:p>
      <text:section text:style-name="Sect1" text:name="thread-bottom-container">
        <text:p text:style-name="P25"/>
        <text:section text:style-name="Sect1" text:name="thread-bottom">
          <text:p text:style-name="P25"><draw:control text:anchor-type="as-char" draw:z-index="0" draw:name="Shape1" draw:style-name="gr1" draw:text-style-name="P26" svg:width="2.7921in" svg:height="0.5315in" draw:control="control1"/></text:p>
          <text:section text:style-name="Sect1" text:name="prompt-textarea">
            <text:p text:style-name="P27"/>
          </text:section>
          <text:p text:style-name="P24"><draw:control text:anchor-type="as-char" draw:z-index="1" draw:name="Shape2" draw:style-name="gr2" draw:text-style-name="P28" svg:width="2.7504in" svg:height="0.3232in" draw:control="control2"/></text:p>
          <text:p text:style-name="Text_20_body">Outils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0:16:31.881000000</meta:creation-date>
    <dc:date>2025-05-26T11:28:38.403000000</dc:date>
    <meta:editing-duration>PT1M31S</meta:editing-duration>
    <meta:editing-cycles>1</meta:editing-cycles>
    <meta:document-statistic meta:table-count="2" meta:image-count="0" meta:object-count="0" meta:page-count="14" meta:paragraph-count="546" meta:word-count="3179" meta:character-count="20208" meta:non-whitespace-character-count="14821"/>
    <meta:generator>LibreOffice/24.8.6.2$Windows_X86_64 LibreOffice_project/6d98ba145e9a8a39fc57bcc76981d1fb1316c60c</meta:generator>
  </office:meta>
</office:document-meta>
</file>