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f363f"/>
    </style:style>
    <style:style style:name="P2" style:family="paragraph" style:parent-style-name="Text_20_body" style:list-style-name="L1">
      <style:text-properties officeooo:paragraph-rsid="000f363f"/>
    </style:style>
    <style:style style:name="P3" style:family="paragraph" style:parent-style-name="Standard">
      <style:text-properties officeooo:paragraph-rsid="000f363f"/>
    </style:style>
    <style:style style:name="T1" style:family="text">
      <style:text-properties officeooo:rsid="000f363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o </text:span><text:span text:style-name="Strong_20_Emphasis"><text:span text:style-name="T1">generate a Sudoku puzzle with only one solution</text:span></text:span><text:span text:style-name="T1">, you need to:</text:span></text:p>
      <text:list text:style-name="L1">
        <text:list-item>
          <text:p text:style-name="P2"><text:span text:style-name="Strong_20_Emphasis">Generate a full, valid Sudoku board.</text:span></text:p>
        </text:list-item>
        <text:list-item>
          <text:p text:style-name="P2"><text:span text:style-name="Strong_20_Emphasis">Remove numbers</text:span> while ensuring the board still has <text:span text:style-name="Strong_20_Emphasis">only one solution</text:span> after each removal.</text:p>
        </text:list-item>
      </text:list>
      <text:p text:style-name="P3"/>
      <text:p text:style-name="P3"/>
      <text:p text:style-name="P1"><text:span text:style-name="T1">import random</text:span></text:p>
      <text:p text:style-name="P1">import copy</text:p>
      <text:p text:style-name="P1"/>
      <text:p text:style-name="P1">def is_valid(board, row, col, num):</text:p>
      <text:p text:style-name="P1"><text:s text:c="4"/>if num in board[row]:</text:p>
      <text:p text:style-name="P1"><text:s text:c="8"/>return False</text:p>
      <text:p text:style-name="P1"><text:s text:c="4"/>if num in [board[i][col] for i in range(9)]:</text:p>
      <text:p text:style-name="P1"><text:s text:c="8"/>return False</text:p>
      <text:p text:style-name="P1"><text:s text:c="4"/>box_row, box_col = 3 * (row // 3), 3 * (col // 3)</text:p>
      <text:p text:style-name="P1"><text:s text:c="4"/>for i in range(3):</text:p>
      <text:p text:style-name="P1"><text:s text:c="8"/>for j in range(3):</text:p>
      <text:p text:style-name="P1"><text:s text:c="12"/>if board[box_row + i][box_col + j] == num:</text:p>
      <text:p text:style-name="P1"><text:s text:c="16"/>return False</text:p>
      <text:p text:style-name="P1"><text:s text:c="4"/>return True</text:p>
      <text:p text:style-name="P1"/>
      <text:p text:style-name="P1">def solve(board, count_solutions=False):</text:p>
      <text:p text:style-name="P1"><text:s text:c="4"/>solutions = 0</text:p>
      <text:p text:style-name="P1"/>
      <text:p text:style-name="P1"><text:s text:c="4"/>def backtrack():</text:p>
      <text:p text:style-name="P1"><text:s text:c="8"/>nonlocal solutions</text:p>
      <text:p text:style-name="P1"><text:s text:c="8"/>for i in range(9):</text:p>
      <text:p text:style-name="P1"><text:s text:c="12"/>for j in range(9):</text:p>
      <text:p text:style-name="P1"><text:s text:c="16"/>if board[i][j] == 0:</text:p>
      <text:p text:style-name="P1"><text:s text:c="20"/>for num in range(1, 10):</text:p>
      <text:p text:style-name="P1"><text:s text:c="24"/>if is_valid(board, i, j, num):</text:p>
      <text:p text:style-name="P1"><text:s text:c="28"/>board[i][j] = num</text:p>
      <text:p text:style-name="P1"><text:s text:c="28"/>backtrack()</text:p>
      <text:p text:style-name="P1"><text:s text:c="28"/>board[i][j] = 0</text:p>
      <text:p text:style-name="P1"><text:soft-page-break/><text:s text:c="20"/>return</text:p>
      <text:p text:style-name="P1"><text:s text:c="8"/>solutions += 1</text:p>
      <text:p text:style-name="P1"/>
      <text:p text:style-name="P1"><text:s text:c="4"/>backtrack()</text:p>
      <text:p text:style-name="P1"><text:s text:c="4"/>return solutions if count_solutions else solutions &gt; 0</text:p>
      <text:p text:style-name="P1"/>
      <text:p text:style-name="P1">def generate_full_board():</text:p>
      <text:p text:style-name="P1"><text:s text:c="4"/>board = [[0 for _ in range(9)] for _ in range(9)]</text:p>
      <text:p text:style-name="P1"/>
      <text:p text:style-name="P1"><text:s text:c="4"/>def fill():</text:p>
      <text:p text:style-name="P1"><text:s text:c="8"/>for i in range(9):</text:p>
      <text:p text:style-name="P1"><text:s text:c="12"/>for j in range(9):</text:p>
      <text:p text:style-name="P1"><text:s text:c="16"/>if board[i][j] == 0:</text:p>
      <text:p text:style-name="P1"><text:s text:c="20"/>numbers = list(range(1, 10))</text:p>
      <text:p text:style-name="P1"><text:s text:c="20"/>random.shuffle(numbers)</text:p>
      <text:p text:style-name="P1"><text:s text:c="20"/>for num in numbers:</text:p>
      <text:p text:style-name="P1"><text:s text:c="24"/>if is_valid(board, i, j, num):</text:p>
      <text:p text:style-name="P1"><text:s text:c="28"/>board[i][j] = num</text:p>
      <text:p text:style-name="P1"><text:s text:c="28"/>if fill():</text:p>
      <text:p text:style-name="P1"><text:s text:c="32"/>return True</text:p>
      <text:p text:style-name="P1"><text:s text:c="28"/>board[i][j] = 0</text:p>
      <text:p text:style-name="P1"><text:s text:c="20"/>return False</text:p>
      <text:p text:style-name="P1"><text:s text:c="8"/>return True</text:p>
      <text:p text:style-name="P1"/>
      <text:p text:style-name="P1"><text:s text:c="4"/>fill()</text:p>
      <text:p text:style-name="P1"><text:s text:c="4"/>return board</text:p>
      <text:p text:style-name="P1"/>
      <text:p text:style-name="P1">def remove_numbers(board, attempts=40):</text:p>
      <text:p text:style-name="P1"><text:s text:c="4"/>"""Attempts to remove numbers while ensuring a unique solution."""</text:p>
      <text:p text:style-name="P1"><text:s text:c="4"/>board = copy.deepcopy(board)</text:p>
      <text:p text:style-name="P1"><text:s text:c="4"/>positions = [(i, j) for i in range(9) for j in range(9)]</text:p>
      <text:p text:style-name="P1"><text:s text:c="4"/>random.shuffle(positions)</text:p>
      <text:p text:style-name="P1"><text:soft-page-break/></text:p>
      <text:p text:style-name="P1"><text:s text:c="4"/>for i, j in positions:</text:p>
      <text:p text:style-name="P1"><text:s text:c="8"/>backup = board[i][j]</text:p>
      <text:p text:style-name="P1"><text:s text:c="8"/>board[i][j] = 0</text:p>
      <text:p text:style-name="P1"><text:s text:c="8"/>temp_board = copy.deepcopy(board)</text:p>
      <text:p text:style-name="P1"><text:s text:c="8"/>if solve(temp_board, count_solutions=True) != 1:</text:p>
      <text:p text:style-name="P1"><text:s text:c="12"/>board[i][j] = backup</text:p>
      <text:p text:style-name="P1"><text:s text:c="12"/>attempts -= 1</text:p>
      <text:p text:style-name="P1"><text:s text:c="12"/>if attempts &lt;= 0:</text:p>
      <text:p text:style-name="P1"><text:s text:c="16"/>break</text:p>
      <text:p text:style-name="P1"/>
      <text:p text:style-name="P1"><text:s text:c="4"/>return board</text:p>
      <text:p text:style-name="P1"/>
      <text:p text:style-name="P1">def generate_unique_sudoku():</text:p>
      <text:p text:style-name="P1"><text:s text:c="4"/>full = generate_full_board()</text:p>
      <text:p text:style-name="P1"><text:s text:c="4"/>puzzle = remove_numbers(full)</text:p>
      <text:p text:style-name="P1"><text:s text:c="4"/>return puzzle</text:p>
      <text:p text:style-name="P1"/>
      <text:p text:style-name="P1"># Example usage</text:p>
      <text:p text:style-name="P1">puzzle = generate_unique_sudoku()</text:p>
      <text:p text:style-name="P1">for row in puzzle:</text:p>
      <text:p text:style-name="P1"><text:s text:c="4"/>print(row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6T09:58:40.936000000</meta:creation-date>
    <dc:date>2025-05-26T10:13:39.290000000</dc:date>
    <meta:editing-duration>PT14M58S</meta:editing-duration>
    <meta:editing-cycles>1</meta:editing-cycles>
    <meta:document-statistic meta:table-count="0" meta:image-count="0" meta:object-count="0" meta:page-count="3" meta:paragraph-count="73" meta:word-count="283" meta:character-count="2436" meta:non-whitespace-character-count="1536"/>
    <meta:generator>LibreOffice/24.8.6.2$Windows_X86_64 LibreOffice_project/6d98ba145e9a8a39fc57bcc76981d1fb1316c60c</meta:generator>
  </office:meta>
</office:document-meta>
</file>