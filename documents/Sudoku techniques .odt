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06d6a" officeooo:paragraph-rsid="00106d6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style:text-underline-style="none" fo:font-weight="normal" officeooo:rsid="0012a35d" officeooo:paragraph-rsid="0012a35d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rsid="00106d6a" officeooo:paragraph-rsid="00106d6a"/>
    </style:style>
    <style:style style:name="P4" style:family="paragraph" style:parent-style-name="Standard">
      <style:text-properties officeooo:rsid="000fcf53" officeooo:paragraph-rsid="000fcf53"/>
    </style:style>
    <style:style style:name="P5" style:family="paragraph" style:parent-style-name="Standard" style:list-style-name="L1">
      <style:text-properties officeooo:rsid="000fcf53" officeooo:paragraph-rsid="000fcf53"/>
    </style:style>
    <style:style style:name="P6" style:family="paragraph" style:parent-style-name="Standard" style:list-style-name="L1">
      <style:text-properties officeooo:rsid="000fcf53" officeooo:paragraph-rsid="00106d6a"/>
    </style:style>
    <style:style style:name="P7" style:family="paragraph" style:parent-style-name="Standard">
      <style:text-properties officeooo:rsid="000fcf53" officeooo:paragraph-rsid="00106d6a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0a0ea" officeooo:paragraph-rsid="0010a0ea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1ea67" officeooo:paragraph-rsid="0011ea67"/>
    </style:style>
    <style:style style:name="P10" style:family="paragraph" style:parent-style-name="Standard" style:list-style-name="L2">
      <style:text-properties officeooo:rsid="0010a0ea" officeooo:paragraph-rsid="0010a0ea"/>
    </style:style>
    <style:style style:name="P11" style:family="paragraph" style:parent-style-name="Standard" style:list-style-name="L2">
      <style:text-properties officeooo:rsid="0012a35d" officeooo:paragraph-rsid="0012a35d"/>
    </style:style>
    <style:style style:name="P12" style:family="paragraph" style:parent-style-name="Standard" style:list-style-name="L2">
      <style:text-properties officeooo:rsid="0012a35d" officeooo:paragraph-rsid="0013ab3e"/>
    </style:style>
    <style:style style:name="P13" style:family="paragraph" style:parent-style-name="Standard" style:list-style-name="L2">
      <style:text-properties officeooo:rsid="0012a35d" officeooo:paragraph-rsid="0014217b"/>
    </style:style>
    <style:style style:name="P14" style:family="paragraph" style:parent-style-name="Standard" style:list-style-name="L2">
      <style:text-properties officeooo:rsid="0012a35d" officeooo:paragraph-rsid="00150df1"/>
    </style:style>
    <style:style style:name="P15" style:family="paragraph" style:parent-style-name="Standard" style:list-style-name="L2">
      <style:text-properties officeooo:rsid="00150df1" officeooo:paragraph-rsid="00150df1"/>
    </style:style>
    <style:style style:name="P16" style:family="paragraph" style:parent-style-name="Standard">
      <style:text-properties officeooo:rsid="000fcf53" officeooo:paragraph-rsid="00150df1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10a0ea" officeooo:paragraph-rsid="00150df1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1ea67" officeooo:paragraph-rsid="00150df1"/>
    </style:style>
    <style:style style:name="P19" style:family="paragraph" style:parent-style-name="Standard" style:list-style-name="L3">
      <style:text-properties officeooo:rsid="00150df1" officeooo:paragraph-rsid="00150df1"/>
    </style:style>
    <style:style style:name="T1" style:family="text">
      <style:text-properties officeooo:rsid="0013ab3e"/>
    </style:style>
    <style:style style:name="T2" style:family="text">
      <style:text-properties officeooo:rsid="00106d6a"/>
    </style:style>
    <style:style style:name="T3" style:family="text">
      <style:text-properties officeooo:rsid="0010a0ea"/>
    </style:style>
    <style:style style:name="T4" style:family="text">
      <style:text-properties officeooo:rsid="0011ea67"/>
    </style:style>
    <style:style style:name="T5" style:family="text">
      <style:text-properties officeooo:rsid="0012a35d"/>
    </style:style>
    <style:style style:name="T6" style:family="text">
      <style:text-properties officeooo:rsid="0014217b"/>
    </style:style>
    <style:style style:name="T7" style:family="text">
      <style:text-properties officeooo:rsid="00150df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ling cells</text:p>
      <text:p text:style-name="P2">Easy puzzles can be solved by <text:span text:style-name="T1">simply </text:span>scanning and filling in</text:p>
      <text:p text:style-name="P3">A cell must contain a certain number if either:</text:p>
      <text:p text:style-name="P4">Scanning <text:span text:style-name="T2">one number at a time </text:span><text:span text:style-name="T1">Very easy difficulty level if only this is required.</text:span></text:p>
      <text:list text:style-name="L1">
        <text:list-item>
          <text:p text:style-name="P5"><text:span text:style-name="T2">A cell is candidate for a number only once in a box/row/col</text:span></text:p>
        </text:list-item>
      </text:list>
      <text:p text:style-name="P3">Scanning for all numbers</text:p>
      <text:list text:continue-numbering="true" text:style-name="L1">
        <text:list-item>
          <text:p text:style-name="P6">A <text:span text:style-name="T2">cell only has </text:span><text:span text:style-name="T3">only </text:span><text:span text:style-name="T2">one candidate number</text:span></text:p>
        </text:list-item>
      </text:list>
      <text:p text:style-name="P7"/>
      <text:p text:style-name="P8">Eliminating candidatures <text:span text:style-name="T4">(outer puzzle)</text:span></text:p>
      <text:p text:style-name="P9"><text:span text:style-name="T5">M</text:span>edium puzzles can be solved <text:span text:style-name="T5">by simple candidate elimination techniques. </text:span><text:span text:style-name="T1">Filling in the candidate notes for units that have only two, then three, then four, empty cells minimises the work.</text:span></text:p>
      <text:list text:style-name="L2">
        <text:list-item>
          <text:p text:style-name="P10"><text:span text:style-name="T4">Simple scanning. </text:span>If a number is already present in the same box/row/cell</text:p>
        </text:list-item>
        <text:list-item>
          <text:p text:style-name="P10"><text:span text:style-name="T5">Naked pair. </text:span>Two cells in a unit (row/column/box) <text:span text:style-name="T4">have only</text:span> the same two candidates, so those candidates can be removed from other cells in the unit.</text:p>
        </text:list-item>
        <text:list-item>
          <text:p text:style-name="P11">Hidden pair. Two numbers are candidates for only two cells within a unit; other candidates are removed from those cells. This process reveals a <text:span text:style-name="T6">naked</text:span> pair.</text:p>
        </text:list-item>
        <text:list-item>
          <text:p text:style-name="P12">Naked Triple Three cells <text:span text:style-name="T4">have only</text:span><text:span text:style-name="T3"> the same </text:span>three candidates; remove them from other cells in the unit.</text:p>
        </text:list-item>
        <text:list-item>
          <text:p text:style-name="P13">Hidden Triple. Three numbers are candidates for only three cells within a unit; remove other candidates from those cells. This process reveals a <text:span text:style-name="T6">naked</text:span> <text:span text:style-name="T6">triple.</text:span></text:p>
        </text:list-item>
        <text:list-item>
          <text:p text:style-name="P13">Pointing Pair / Triple. If all candidates for a number <text:span text:style-name="T6">i</text:span>n a box, <text:span text:style-name="T6">are </text:span>in <text:span text:style-name="T6">the same</text:span> row or column, remove that number from <text:span text:style-name="T6">the </text:span>that row/column <text:span text:style-name="T6">in other boxes</text:span>.</text:p>
        </text:list-item>
        <text:list-item>
          <text:p text:style-name="P14">Claiming Pair / Triple. If all candidates for a number <text:span text:style-name="T7">i</text:span>n a row or column, <text:span text:style-name="T7">are </text:span>in <text:span text:style-name="T7">the same box</text:span>, remove that number from the rest of the box.</text:p>
        </text:list-item>
        <text:list-item>
          <text:p text:style-name="P15">Naked and hidden quads are also possible</text:p>
        </text:list-item>
      </text:list>
      <text:p text:style-name="P16"/>
      <text:p text:style-name="P17"><text:span text:style-name="T7">Inn</text:span><text:span text:style-name="T4">er puzzle</text:span></text:p>
      <text:p text:style-name="P18"><text:span text:style-name="T7">Hard</text:span> puzzles can<text:span text:style-name="T7">not</text:span> be solved <text:span text:style-name="T5">by simple </text:span><text:span text:style-name="T7">techniques</text:span></text:p>
      <text:list text:style-name="L3">
        <text:list-item>
          <text:p text:style-name="P19">Trial and err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8T07:22:51.380441800</meta:creation-date>
    <dc:date>2026-01-18T09:12:40.356310900</dc:date>
    <meta:editing-duration>PT6M19S</meta:editing-duration>
    <meta:editing-cycles>1</meta:editing-cycles>
    <meta:document-statistic meta:table-count="0" meta:image-count="0" meta:object-count="0" meta:page-count="1" meta:paragraph-count="20" meta:word-count="292" meta:character-count="1613" meta:non-whitespace-character-count="1352"/>
    <meta:generator>LibreOffice/25.8.3.2$Windows_X86_64 LibreOffice_project/8ca8d55c161d602844f5428fa4b58097424e324e</meta:generator>
  </office:meta>
</office:document-meta>
</file>