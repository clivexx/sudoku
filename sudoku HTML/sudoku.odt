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9c18" officeooo:paragraph-rsid="00049c18"/>
    </style:style>
    <style:style style:name="P2" style:family="paragraph" style:parent-style-name="Standard">
      <style:text-properties officeooo:rsid="0006337c" officeooo:paragraph-rsid="0006337c"/>
    </style:style>
    <style:style style:name="P3" style:family="paragraph" style:parent-style-name="Standard">
      <style:text-properties officeooo:rsid="000784e3" officeooo:paragraph-rsid="000784e3"/>
    </style:style>
    <style:style style:name="P4" style:family="paragraph" style:parent-style-name="Standard" style:list-style-name="L1">
      <style:text-properties officeooo:paragraph-rsid="000784e3"/>
    </style:style>
    <style:style style:name="P5" style:family="paragraph" style:parent-style-name="Standard" style:list-style-name="L1">
      <style:text-properties officeooo:rsid="000784e3" officeooo:paragraph-rsid="000784e3"/>
    </style:style>
    <style:style style:name="T1" style:family="text">
      <style:text-properties officeooo:rsid="0006337c"/>
    </style:style>
    <style:style style:name="T2" style:family="text">
      <style:text-properties officeooo:rsid="000784e3"/>
    </style:style>
    <style:style style:name="T3" style:family="text">
      <style:text-properties officeooo:rsid="00095444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rs<text:tab/><text:tab/>68 68 <text:s/>only two numbers for two cells</text:p>
      <text:p text:style-name="P1"><text:tab/><text:tab/><text:tab/>remove from other lines or group</text:p>
      <text:p text:style-name="P1"/>
      <text:p text:style-name="P1">Triplet <text:tab/><text:tab/>25 56 26 <text:s/>or 256 256 256 etc. only three numbers for three cells</text:p>
      <text:p text:style-name="P1"><text:tab/><text:tab/><text:tab/>remove from other lines or group</text:p>
      <text:p text:style-name="P1"/>
      <text:p text:style-name="P2">Hidden pair or triplet. Remove other numbers from the two or three cells</text:p>
      <text:p text:style-name="P1"/>
      <text:p text:style-name="P1"><text:span text:style-name="T1">Only number</text:span><text:tab/>Only <text:span text:style-name="T1">ocurrence for number in a line or group</text:span></text:p>
      <text:p text:style-name="P1"/>
      <text:p text:style-name="P2">only cell<text:tab/>only number possible in a cell</text:p>
      <text:p text:style-name="P2"/>
      <text:p text:style-name="P3">Impossible rectangle There must only be one solution. So there can’t be a linkage of identical pairs.</text:p>
      <text:list text:style-name="L1">
        <text:list-item>
          <text:p text:style-name="P4"><text:span text:style-name="T2">23 23 23 123 becomes 1</text:span></text:p>
        </text:list-item>
        <text:list-item>
          <text:p text:style-name="P5">123 123 23 23 no other 1 in the 123 123 row</text:p>
        </text:list-item>
        <text:list-item>
          <text:p text:style-name="P5">if <text:span text:style-name="T3">one of </text:span></text:p>
        </text:list-item>
      </text:list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5:55:41.219000000</meta:creation-date>
    <dc:date>2025-06-11T16:59:37.992000000</dc:date>
    <meta:editing-duration>PT12M7S</meta:editing-duration>
    <meta:editing-cycles>1</meta:editing-cycles>
    <meta:document-statistic meta:table-count="0" meta:image-count="0" meta:object-count="0" meta:page-count="1" meta:paragraph-count="11" meta:word-count="109" meta:character-count="535" meta:non-whitespace-character-count="428"/>
    <meta:generator>LibreOffice/24.8.6.2$Windows_X86_64 LibreOffice_project/6d98ba145e9a8a39fc57bcc76981d1fb1316c60c</meta:generator>
  </office:meta>
</office:document-meta>
</file>